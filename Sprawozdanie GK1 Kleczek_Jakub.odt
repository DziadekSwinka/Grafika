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6000002652E118D98.png" manifest:media-type="image/png"/>
  <manifest:file-entry manifest:full-path="Pictures/1000000100000325000002F6DBB51A51.png" manifest:media-type="image/png"/>
  <manifest:file-entry manifest:full-path="Pictures/10000001000001FF000001601778737D.png" manifest:media-type="image/png"/>
  <manifest:file-entry manifest:full-path="Pictures/10000001000001720000025BC40F1E73.png" manifest:media-type="image/png"/>
  <manifest:file-entry manifest:full-path="Pictures/10000001000002F5000002F33BEF03DE.png" manifest:media-type="image/png"/>
  <manifest:file-entry manifest:full-path="Pictures/1000000100000228000001567C96994D.png" manifest:media-type="image/png"/>
  <manifest:file-entry manifest:full-path="Pictures/100000010000024E00000011967524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font-weight="bold" officeooo:rsid="001aaa10" officeooo:paragraph-rsid="001aaa10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20pt" fo:font-weight="bold" officeooo:rsid="001693cd" officeooo:paragraph-rsid="001693cd" style:font-size-asian="20pt" style:font-weight-asian="bold" style:font-name-complex="Calibri" style:font-size-complex="20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font-size="20pt" fo:font-weight="bold" officeooo:rsid="001693cd" officeooo:paragraph-rsid="001693cd" style:font-size-asian="20pt" style:font-weight-asian="bold" style:font-name-complex="Calibri" style:font-size-complex="20pt" style:font-weight-complex="bold"/>
    </style:style>
    <style:style style:name="P11" style:family="paragraph" style:parent-style-name="Text_20_body">
      <style:text-properties style:font-name="Calibri" fo:font-size="14pt" officeooo:paragraph-rsid="001693cd" style:font-size-asian="14pt" style:font-name-complex="Calibri" style:font-size-complex="14pt"/>
    </style:style>
    <style:style style:name="P12" style:family="paragraph" style:parent-style-name="Text_20_body" style:list-style-name="L1">
      <style:text-properties style:font-name="Calibri" fo:font-size="20pt" fo:font-weight="bold" officeooo:rsid="001693cd" officeooo:paragraph-rsid="001693cd" style:font-size-asian="20pt" style:font-weight-asian="bold" style:font-name-complex="Calibri" style:font-size-complex="20pt" style:font-weight-complex="bold"/>
    </style:style>
    <style:style style:name="P13" style:family="paragraph" style:parent-style-name="Text_20_body" style:list-style-name="L1">
      <style:text-properties style:font-name="Calibri" fo:font-size="14pt" officeooo:rsid="001693cd" officeooo:paragraph-rsid="001693cd" style:font-size-asian="14pt" style:font-name-complex="Calibri" style:font-size-complex="14pt"/>
    </style:style>
    <style:style style:name="P14" style:family="paragraph" style:parent-style-name="Text_20_body" style:list-style-name="L1">
      <style:text-properties style:font-name="Calibri" fo:font-size="20pt" fo:font-style="normal" fo:font-weight="bold" officeooo:rsid="001693cd" officeooo:paragraph-rsid="001693cd" style:font-size-asian="20pt" style:font-style-asian="normal" style:font-weight-asian="bold" style:font-name-complex="Calibri" style:font-size-complex="20pt" style:font-style-complex="normal" style:font-weight-complex="bold"/>
    </style:style>
    <style:style style:name="P15" style:family="paragraph" style:parent-style-name="Text_20_body">
      <style:text-properties style:font-name="Calibri" fo:font-size="14pt" officeooo:rsid="001693cd" officeooo:paragraph-rsid="001693cd" style:font-size-asian="14pt" style:font-name-complex="Calibri" style:font-size-complex="14pt"/>
    </style:style>
    <style:style style:name="P16" style:family="paragraph" style:parent-style-name="Text_20_body">
      <style:text-properties style:font-name="Calibri" fo:font-size="20pt" fo:font-weight="bold" officeooo:rsid="00176b8a" officeooo:paragraph-rsid="00176b8a" style:font-size-asian="20pt" style:font-weight-asian="bold" style:font-name-complex="Calibri" style:font-size-complex="20pt" style:font-weight-complex="bold"/>
    </style:style>
    <style:style style:name="P17" style:family="paragraph" style:parent-style-name="Text_20_body" style:list-style-name="L2">
      <style:text-properties style:font-name="Calibri" fo:font-size="20pt" fo:font-weight="bold" officeooo:rsid="00176b8a" officeooo:paragraph-rsid="001851a4" style:font-size-asian="20pt" style:font-weight-asian="bold" style:font-name-complex="Calibri" style:font-size-complex="20pt" style:font-weight-complex="bold"/>
    </style:style>
    <style:style style:name="P18" style:family="paragraph" style:parent-style-name="Text_20_body" style:list-style-name="L2">
      <style:text-properties style:font-name="Calibri" fo:font-size="14pt" officeooo:rsid="00176b8a" officeooo:paragraph-rsid="001851a4" style:font-size-asian="14pt" style:font-name-complex="Calibri" style:font-size-complex="14pt"/>
    </style:style>
    <style:style style:name="P19" style:family="paragraph" style:parent-style-name="Text_20_body" style:list-style-name="L3">
      <style:text-properties style:font-name="Calibri" fo:font-size="14pt" officeooo:rsid="00176b8a" officeooo:paragraph-rsid="00176b8a" style:font-size-asian="14pt" style:font-name-complex="Calibri" style:font-size-complex="14pt"/>
    </style:style>
    <style:style style:name="P20" style:family="paragraph" style:parent-style-name="Text_20_body">
      <style:text-properties officeooo:paragraph-rsid="001851a4"/>
    </style:style>
    <style:style style:name="P21" style:family="paragraph" style:parent-style-name="Text_20_body">
      <style:text-properties style:font-name="Calibri" fo:font-size="14pt" officeooo:rsid="00176b8a" officeooo:paragraph-rsid="00176b8a" style:font-size-asian="14pt" style:font-name-complex="Calibri" style:font-size-complex="14pt"/>
    </style:style>
    <style:style style:name="P22" style:family="paragraph" style:parent-style-name="Text_20_body" style:list-style-name="L2">
      <style:text-properties style:font-name="Calibri" fo:font-size="14pt" officeooo:rsid="001693cd" officeooo:paragraph-rsid="00176b8a" style:font-size-asian="14pt" style:font-name-complex="Calibri" style:font-size-complex="14pt"/>
    </style:style>
    <style:style style:name="P23" style:family="paragraph" style:parent-style-name="Text_20_body">
      <style:text-properties style:font-name="Calibri" fo:font-size="20pt" fo:font-weight="bold" officeooo:rsid="001851a4" officeooo:paragraph-rsid="001851a4" style:font-size-asian="20pt" style:font-weight-asian="bold" style:font-name-complex="Calibri" style:font-size-complex="20pt" style:font-weight-complex="bold"/>
    </style:style>
    <style:style style:name="P24" style:family="paragraph" style:parent-style-name="Text_20_body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P25" style:family="paragraph" style:parent-style-name="Text_20_body">
      <style:text-properties style:font-name="Calibri" fo:font-size="14pt" officeooo:rsid="001bb48b" officeooo:paragraph-rsid="001851a4" style:font-size-asian="14pt" style:font-name-complex="Calibri" style:font-size-complex="14pt"/>
    </style:style>
    <style:style style:name="P26" style:family="paragraph" style:parent-style-name="Text_20_body" style:list-style-name="L4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style:font-size-asian="14pt" style:font-name-complex="Calibri" style:font-size-complex="14pt"/>
    </style:style>
    <style:style style:name="T3" style:family="text">
      <style:text-properties style:font-name="Calibri" fo:font-size="14pt" style:font-name-asian="Calibri" style:font-size-asian="14pt" style:font-name-complex="Calibri" style:font-size-complex="14pt"/>
    </style:style>
    <style:style style:name="T4" style:family="text">
      <style:text-properties style:font-name="Calibri" fo:font-size="14pt" officeooo:rsid="0005171a" style:font-size-asian="14pt" style:font-name-complex="Calibri" style:font-size-complex="14pt"/>
    </style:style>
    <style:style style:name="T5" style:family="text">
      <style:text-properties officeooo:rsid="0006efe9"/>
    </style:style>
    <style:style style:name="T6" style:family="text">
      <style:text-properties style:font-name="Calibri" fo:font-size="20pt" fo:font-weight="bold" officeooo:rsid="001bb48b" style:font-size-asian="20pt" style:font-weight-asian="bold" style:font-name-complex="Calibri" style:font-size-complex="20pt" style:font-weight-complex="bold"/>
    </style:style>
    <style:style style:name="T7" style:family="text">
      <style:text-properties style:font-name="Calibri" fo:font-size="14pt" officeooo:rsid="001bb48b" style:font-size-asian="14pt" style:font-name-complex="Calibri" style:font-size-complex="14pt"/>
    </style:style>
    <style:style style:name="T8" style:family="text">
      <style:text-properties style:font-name="Calibri" fo:font-size="20pt" fo:font-weight="bold" officeooo:rsid="001851a4" style:font-size-asian="20pt" style:font-weight-asian="bold" style:font-name-complex="Calibri" style:font-size-complex="20pt" style:font-weight-complex="bold"/>
    </style:style>
    <style:style style:name="T9" style:family="text">
      <style:text-properties style:font-name="Calibri" fo:font-size="14pt" officeooo:rsid="00176b8a" style:font-size-asian="14pt" style:font-name-complex="Calibri" style:font-size-complex="14pt"/>
    </style:style>
    <style:style style:name="T10" style:family="text">
      <style:text-properties officeooo:rsid="001bb48b"/>
    </style:style>
    <style:style style:name="T11" style:family="text">
      <style:text-properties officeooo:rsid="0019e19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6" text:anchor-type="page" text:anchor-page-number="4" svg:x="3.822cm" svg:y="18.576cm" svg:width="12.539cm" svg:height="11.807cm" draw:z-index="6">
        <draw:image xlink:href="Pictures/1000000100000325000002F6DBB51A51.png" xlink:type="simple" xlink:show="embed" xlink:actuate="onLoad" draw:mime-type="image/png"/>
      </draw:frame>
      <draw:frame draw:style-name="fr2" draw:name="Obraz1" text:anchor-type="page" text:anchor-page-number="2" svg:x="2.307cm" svg:y="10.241cm" svg:width="7.832cm" svg:height="12.764cm" draw:z-index="0">
        <draw:image xlink:href="Pictures/10000001000001720000025BC40F1E73.png" xlink:type="simple" xlink:show="embed" xlink:actuate="onLoad" draw:mime-type="image/png"/>
      </draw:frame>
      <draw:frame draw:style-name="fr3" draw:name="Obraz2" text:anchor-type="page" text:anchor-page-number="3" svg:x="2.491cm" svg:y="2.768cm" svg:width="11.545cm" svg:height="11.515cm" draw:z-index="1">
        <draw:image xlink:href="Pictures/10000001000002F5000002F33BEF03DE.png" xlink:type="simple" xlink:show="embed" xlink:actuate="onLoad" draw:mime-type="image/png"/>
      </draw:frame>
      <draw:frame draw:style-name="fr3" draw:name="Obraz3" text:anchor-type="page" text:anchor-page-number="4" svg:x="0cm" svg:y="2.256cm" svg:width="9.721cm" svg:height="6.563cm" draw:z-index="2">
        <draw:image xlink:href="Pictures/10000001000001FF000001601778737D.png" xlink:type="simple" xlink:show="embed" xlink:actuate="onLoad" draw:mime-type="image/png"/>
      </draw:frame>
      <draw:frame draw:style-name="fr2" draw:name="Obraz4" text:anchor-type="page" text:anchor-page-number="4" svg:x="0cm" svg:y="9.58cm" svg:width="9.721cm" svg:height="5.932cm" draw:z-index="3">
        <draw:image xlink:href="Pictures/1000000100000228000001567C96994D.png" xlink:type="simple" xlink:show="embed" xlink:actuate="onLoad" draw:mime-type="image/png"/>
      </draw:frame>
      <draw:frame draw:style-name="fr3" draw:name="Obraz2 kopia 1" text:anchor-type="page" text:anchor-page-number="4" svg:x="10.174cm" svg:y="2.256cm" svg:width="10.827cm" svg:height="11.402cm" draw:z-index="4">
        <draw:image xlink:href="Pictures/1000000100000246000002652E118D98.png" xlink:type="simple" xlink:show="embed" xlink:actuate="onLoad" draw:mime-type="image/png"/>
      </draw:frame>
      <draw:frame draw:style-name="fr3" draw:name="Obraz5" text:anchor-type="page" text:anchor-page-number="4" svg:x="11.347cm" svg:y="15.055cm" svg:width="10.859cm" svg:height="0.326cm" draw:z-index="5">
        <draw:image xlink:href="Pictures/100000010000024E00000011967524AD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3"/>
      <text:p text:style-name="P4">OBRONIO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1</text:span></text:span></text:p>
      <text:p text:style-name="P5"><text:span text:style-name="Domyślna_20_czcionka_20_akapitu"><text:span text:style-name="T1">Data:</text:span></text:span><text:span text:style-name="Domyślna_20_czcionka_20_akapitu"><text:span text:style-name="T2"> 11.03.2026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2"> "Grafika 2D z u</text:span></text:span><text:span text:style-name="Domyślna_20_czcionka_20_akapitu"><text:span text:style-name="T3">ż</text:span></text:span><text:span text:style-name="Domyślna_20_czcionka_20_akapitu"><text:span text:style-name="T2">yciem HTML Canvas"</text:span></text:span></text:p>
      <text:p text:style-name="P5"><text:span text:style-name="Domyślna_20_czcionka_20_akapitu"><text:span text:style-name="T1">Wariant:</text:span></text:span><text:span text:style-name="Domyślna_20_czcionka_20_akapitu"><text:span text:style-name="T2"> </text:span></text:span><text:span text:style-name="Domyślna_20_czcionka_20_akapitu"><text:span text:style-name="T4">1</text:span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Gr.1b</text:p>
      <text:p text:style-name="P9"><text:soft-page-break/>Zadanie 1</text:p>
      <text:list text:style-name="L1">
        <text:list-item>
          <text:p text:style-name="P10">Polecenie</text:p>
        </text:list-item>
      </text:list>
      <text:p text:style-name="P11">Plik Lab2Ex1.html proponuje rozsze<text:span text:style-name="T5">rz</text:span>enia do standardowych funkcji rysowania HTML Canvas.</text:p>
      <text:p text:style-name="P11">Narysowa<text:span text:style-name="T5">ć</text:span> obraz zgodnie z wariantem zadania (patrz Fig. 1) (u<text:span text:style-name="T5">ż</text:span>ywaj<text:span text:style-name="T5">ą</text:span>c zar<text:span text:style-name="T5">ó</text:span>wno standardowe jak i niestandardowe funkcje rysowania). </text:p>
      <text:list text:continue-numbering="true" text:style-name="L1">
        <text:list-item>
          <text:p text:style-name="P12">Wykorzystane komendy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item>
        <text:list-item>
          <text:p text:style-name="P14"><text:soft-page-break/>Wynik działania</text:p>
        </text:list-item>
      </text:list>
      <text:p text:style-name="P15"/>
      <text:p text:style-name="P16">Zadanie 2</text:p>
      <text:list xml:id="list975995815" text:style-name="L2">
        <text:list-item>
          <text:p text:style-name="P17">Polecenie</text:p>
          <text:p text:style-name="P18"/>
          <text:p text:style-name="P18">W pliku Lab2Ex2.html program domyślnie rysuje szereg kwadratów. Stworzy´c narzędzia pozwalające na wykonywanie czynności </text:p>
        </text:list-item>
      </text:list>
      <text:list text:style-name="L3">
        <text:list-item>
          <text:p text:style-name="P19">"czyszczenie" canvasu - Clear button: Clear (Hint! Przy inicializacji musi by´c document.getElementById("clearButton").onclick = doClear; ) </text:p>
        </text:list-item>
        <text:list-item>
          <text:p text:style-name="P19">dodanie jednego nowego koloru do elementu . Implementować nowy kolor przez funkcje˛ doMouseMove. </text:p>
        </text:list-item>
        <text:list-item>
          <text:p text:style-name="P19">opracowanie nowego narzędzia - rysowania szeregu wielokątów (zgodnie z wariantem zad </text:p>
        </text:list-item>
      </text:list>
      <text:p text:style-name="P20"><text:span text:style-name="T6">2.</text:span><text:span text:style-name="T7"> </text:span><text:span text:style-name="T8">Wykorzystane</text:span><text:span text:style-name="T9"> </text:span><text:span text:style-name="T8">polecenia</text:span></text:p>
      <text:p text:style-name="P21"><text:soft-page-break/></text:p>
      <text:list text:continue-list="list975995815" text:style-name="L2">
        <text:list-header>
          <text:p text:style-name="P22"/>
        </text:list-header>
      </text:list>
      <text:p text:style-name="P23"><text:span text:style-name="T10">3. </text:span>Wynik działania</text:p>
      <text:p text:style-name="P2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text:soft-page-break/><text:span text:style-name="T10">4</text:span>.Wykorzystane komendy:</text:p>
      <text:p text:style-name="P25">https://github.com/DziadekSwinka/Grafika/tree/872ba7d58c9a4b67a3925f2e21622b65b0abe453/Lab1%20-%20Canvas</text:p>
      <text:p text:style-name="P24"/>
      <text:p text:style-name="P23"><text:span text:style-name="T10">5. </text:span>Wnioski</text:p>
      <text:list text:style-name="L4">
        <text:list-item>
          <text:p text:style-name="P26">Element <text:span text:style-name="Source_20_Text">&lt;canvas&gt;</text:span> umożliwia rysowanie grafiki w przeglądarce przy użyciu JavaScript i daje dużą swobodę tworzenia. </text:p>
        </text:list-item>
        <text:list-item>
          <text:p text:style-name="P26">Rysowanie odbywa się poprzez kontekst 2D i operacje krok po kroku, co wymaga precyzyjnego określania współrzędnych. </text:p>
        </text:list-item>
        <text:list-item>
          <text:p text:style-name="P26"><text:span text:style-name="T11">Canvas p</text:span>ozwala również na zmianę stylów rysowania (kolorów, grubości linii, wypełnień), co zwiększa możliwości wizualne tworzonych elementów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1T11:48:44.975943900</dc:date>
    <meta:editing-duration>PT18M11S</meta:editing-duration>
    <meta:editing-cycles>3</meta:editing-cycles>
    <meta:generator>LibreOffice/25.8.6.2$Windows_X86_64 LibreOffice_project/b4b39682cd9868fa725bc664aff94278d315bd04</meta:generator>
    <meta:print-date>2026-06-11T11:38:47.398269800</meta:print-date>
    <meta:printed-by>Pliki PDF</meta:printed-by>
    <meta:document-statistic meta:table-count="0" meta:image-count="7" meta:object-count="0" meta:page-count="5" meta:paragraph-count="33" meta:word-count="191" meta:character-count="1529" meta:non-whitespace-character-count="1373"/>
  </office:meta>
</office:document-meta>
</file>