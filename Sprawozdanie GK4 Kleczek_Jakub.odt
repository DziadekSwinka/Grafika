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6E0000026EA3226D9E.png" manifest:media-type="image/png"/>
  <manifest:file-entry manifest:full-path="Pictures/1000000100000119000001A64BB31731.png" manifest:media-type="image/png"/>
  <manifest:file-entry manifest:full-path="Pictures/100000010000026E00000273E99EB358.png" manifest:media-type="image/png"/>
  <manifest:file-entry manifest:full-path="Pictures/10000001000001F60000030EA8DB997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fo:font-weight="bold" officeooo:paragraph-rsid="001693cd" style:font-size-asian="20pt" style:font-weight-asian="bold" style:font-name-complex="Calibri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officeooo:paragraph-rsid="001693cd" style:font-size-asian="14pt" style:font-name-complex="Calibri" style:font-size-complex="14pt"/>
    </style:style>
    <style:style style:name="P3" style:family="paragraph" style:parent-style-name="Standard">
      <style:text-properties style:font-name="Calibri" fo:font-size="14pt" officeooo:paragraph-rsid="001693cd" style:font-size-asian="14pt" style:font-name-complex="Calibri" style:font-size-complex="14pt"/>
    </style:style>
    <style:style style:name="P4" style:family="paragraph" style:parent-style-name="Standard">
      <style:text-properties style:font-name="Calibri" fo:font-size="22pt" fo:font-weight="bold" officeooo:rsid="001aaa10" officeooo:paragraph-rsid="001693cd" style:font-size-asian="22pt" style:font-weight-asian="bold" style:font-name-complex="Calibri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693cd"/>
    </style:style>
    <style:style style:name="P6" style:family="paragraph" style:parent-style-name="Standard">
      <style:paragraph-properties fo:text-align="end" style:justify-single-word="false"/>
      <style:text-properties style:font-name="Calibri" fo:font-size="14pt" officeooo:paragraph-rsid="001693cd" style:font-size-asian="14pt" style:font-name-complex="Calibri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Calibri" fo:font-size="16pt" officeooo:rsid="0005171a" officeooo:paragraph-rsid="001693cd" style:font-size-asian="16pt" style:font-name-complex="Calibri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Calibri" fo:font-size="16pt" officeooo:paragraph-rsid="001693cd" style:font-size-asian="16pt" style:font-name-complex="Calibri" style:font-size-complex="16pt"/>
    </style:style>
    <style:style style:name="P9" style:family="paragraph" style:parent-style-name="Text_20_body">
      <style:text-properties officeooo:paragraph-rsid="001d4b95"/>
    </style:style>
    <style:style style:name="P10" style:family="paragraph" style:parent-style-name="Text_20_body">
      <style:text-properties fo:font-variant="normal" fo:text-transform="none" fo:color="#1d2125" loext:opacity="100%" style:font-name="system-ui" fo:font-size="11.25pt" fo:letter-spacing="normal" fo:font-style="normal" fo:font-weight="normal" officeooo:rsid="00176b8a" officeooo:paragraph-rsid="001e171a" style:font-size-asian="14pt" style:font-name-complex="Calibri" style:font-size-complex="14pt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d2125" loext:opacity="100%" style:font-name="system-ui" fo:font-size="11.25pt" fo:letter-spacing="normal" fo:font-style="normal" fo:font-weight="normal" officeooo:rsid="00176b8a" style:font-size-asian="14pt" style:font-name-complex="Calibri" style:font-size-complex="14pt"/>
    </style:style>
    <style:style style:name="P12" style:family="paragraph" style:parent-style-name="Text_20_body">
      <style:text-properties style:font-name="Calibri" fo:font-size="20pt" fo:font-weight="bold" officeooo:rsid="001d4b95" style:font-size-asian="20pt" style:font-weight-asian="bold" style:font-name-complex="Calibri" style:font-size-complex="20pt" style:font-weight-complex="bold"/>
    </style:style>
    <style:style style:name="P13" style:family="paragraph" style:parent-style-name="Text_20_body">
      <style:text-properties style:font-name="Calibri" fo:font-size="20pt" fo:font-weight="bold" officeooo:rsid="001bb48b" officeooo:paragraph-rsid="001e171a" style:font-size-asian="20pt" style:font-weight-asian="bold" style:font-name-complex="Calibri" style:font-size-complex="20pt" style:font-weight-complex="bold"/>
    </style:style>
    <style:style style:name="P14" style:family="paragraph" style:parent-style-name="Text_20_body">
      <style:text-properties style:font-name="Calibri" fo:font-size="20pt" fo:font-weight="bold" officeooo:rsid="001851a4" officeooo:paragraph-rsid="001e171a" style:font-size-asian="20pt" style:font-weight-asian="bold" style:font-name-complex="Calibri" style:font-size-complex="20pt" style:font-weight-complex="bold"/>
    </style:style>
    <style:style style:name="P15" style:family="paragraph" style:parent-style-name="Text_20_body">
      <style:text-properties style:font-name="Calibri" fo:font-size="20pt" fo:font-weight="bold" officeooo:rsid="001d4b95" officeooo:paragraph-rsid="001851a4" style:font-size-asian="20pt" style:font-weight-asian="bold" style:font-name-complex="Calibri" style:font-size-complex="20pt" style:font-weight-complex="bold"/>
    </style:style>
    <style:style style:name="P16" style:family="paragraph" style:parent-style-name="Text_20_body">
      <style:text-properties style:font-name="Calibri" fo:font-size="20pt" officeooo:rsid="001851a4" officeooo:paragraph-rsid="001851a4" style:font-size-asian="20pt" style:font-name-complex="Calibri" style:font-size-complex="20pt"/>
    </style:style>
    <style:style style:name="P17" style:family="paragraph" style:parent-style-name="Text_20_body">
      <style:text-properties style:font-name="Calibri" fo:font-size="14pt" officeooo:rsid="001851a4" officeooo:paragraph-rsid="001851a4" style:font-size-asian="14pt" style:font-name-complex="Calibri" style:font-size-complex="14pt"/>
    </style:style>
    <style:style style:name="T1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2" style:family="text">
      <style:text-properties style:font-name="Calibri" fo:font-size="14pt" fo:font-weight="bold" officeooo:rsid="00220ac1" style:font-size-asian="14pt" style:font-weight-asian="bold" style:font-name-complex="Calibri" style:font-size-complex="14pt" style:font-weight-complex="bold"/>
    </style:style>
    <style:style style:name="T3" style:family="text">
      <style:text-properties style:font-name="Calibri" fo:font-size="14pt" style:font-size-asian="14pt" style:font-name-complex="Calibri" style:font-size-complex="14pt"/>
    </style:style>
    <style:style style:name="T4" style:family="text">
      <style:text-properties style:font-name="Calibri" fo:font-size="14pt" officeooo:rsid="00220ac1" style:font-size-asian="14pt" style:font-name-complex="Calibri" style:font-size-complex="14pt"/>
    </style:style>
    <style:style style:name="T5" style:family="text">
      <style:text-properties style:font-name="Calibri" fo:font-size="14pt" officeooo:rsid="0005171a" style:font-size-asian="14pt" style:font-name-complex="Calibri" style:font-size-complex="14pt"/>
    </style:style>
    <style:style style:name="T6" style:family="text">
      <style:text-properties style:font-name="Calibri" fo:font-size="20pt" fo:font-weight="bold" officeooo:rsid="001d4b95" style:font-size-asian="20pt" style:font-weight-asian="bold" style:font-name-complex="Calibri" style:font-size-complex="20pt" style:font-weight-complex="bold"/>
    </style:style>
    <style:style style:name="T7" style:family="text">
      <style:text-properties style:font-name="Calibri" fo:font-size="20pt" fo:font-weight="bold" officeooo:rsid="00176b8a" style:font-size-asian="20pt" style:font-weight-asian="bold" style:font-name-complex="Calibri" style:font-size-complex="20pt" style:font-weight-complex="bold"/>
    </style:style>
    <style:style style:name="T8" style:family="text">
      <style:text-properties officeooo:rsid="001bb48b"/>
    </style:style>
    <style:style style:name="T9" style:family="text">
      <style:text-properties fo:font-weight="bold" officeooo:rsid="001bb48b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3" text:anchor-type="page" text:anchor-page-number="2" svg:x="0.799cm" svg:y="12.213cm" svg:width="5.948cm" svg:height="8.932cm" draw:z-index="0">
        <draw:image xlink:href="Pictures/1000000100000119000001A64BB31731.png" xlink:type="simple" xlink:show="embed" xlink:actuate="onLoad" draw:mime-type="image/png"/>
      </draw:frame>
      <draw:frame draw:style-name="fr2" draw:name="Obraz1" text:anchor-type="page" text:anchor-page-number="3" svg:x="1.334cm" svg:y="3.014cm" svg:width="7.512cm" svg:height="7.572cm" draw:z-index="1">
        <draw:image xlink:href="Pictures/100000010000026E00000273E99EB358.png" xlink:type="simple" xlink:show="embed" xlink:actuate="onLoad" draw:mime-type="image/png"/>
      </draw:frame>
      <draw:frame draw:style-name="fr1" draw:name="Obraz2" text:anchor-type="page" text:anchor-page-number="3" svg:x="11.204cm" svg:y="3.032cm" svg:width="7.717cm" svg:height="7.717cm" draw:z-index="2">
        <draw:image xlink:href="Pictures/100000010000026E0000026EA3226D9E.png" xlink:type="simple" xlink:show="embed" xlink:actuate="onLoad" draw:mime-type="image/png"/>
      </draw:frame>
      <draw:frame draw:style-name="fr3" draw:name="Obraz4" text:anchor-type="page" text:anchor-page-number="2" svg:x="8.955cm" svg:y="12.116cm" svg:width="8.262cm" svg:height="12.869cm" draw:z-index="3">
        <draw:image xlink:href="Pictures/10000001000001F60000030EA8DB997A.png" xlink:type="simple" xlink:show="embed" xlink:actuate="onLoad" draw:mime-type="image/png"/>
      </draw:frame>
      <text:p text:style-name="P1">SPRAWOZDANIE</text:p>
      <text:p text:style-name="P2">Zajęcia: Grafika komputerowa</text:p>
      <text:p text:style-name="P2">Prowadzący: mgr inż. Jakub Krawczyk</text:p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Domyślna_20_czcionka_20_akapitu"><text:span text:style-name="T1">Laboratorium: </text:span></text:span><text:span text:style-name="Domyślna_20_czcionka_20_akapitu"><text:span text:style-name="T2">4</text:span></text:span></text:p>
      <text:p text:style-name="P5"><text:span text:style-name="Domyślna_20_czcionka_20_akapitu"><text:span text:style-name="T1">Temat:</text:span></text:span><text:span text:style-name="Domyślna_20_czcionka_20_akapitu"><text:span text:style-name="T3"> "</text:span></text:span><text:span text:style-name="Domyślna_20_czcionka_20_akapitu"><text:span text:style-name="T4">Geometria trójwymiarowa OpenGL</text:span></text:span><text:span text:style-name="Domyślna_20_czcionka_20_akapitu"><text:span text:style-name="T3">"</text:span></text:span></text:p>
      <text:p text:style-name="P5"><text:span text:style-name="Domyślna_20_czcionka_20_akapitu"><text:span text:style-name="T1">Wariant:</text:span></text:span><text:span text:style-name="Domyślna_20_czcionka_20_akapitu"><text:span text:style-name="T3"> </text:span></text:span><text:span text:style-name="Domyślna_20_czcionka_20_akapitu"><text:span text:style-name="T5">1</text:span></text:span></text:p>
      <text:p text:style-name="P6"/>
      <text:p text:style-name="P6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6"/>
      <text:p text:style-name="P7">Jakub Kleczek</text:p>
      <text:p text:style-name="P8">Informatyka I stopień,</text:p>
      <text:p text:style-name="P8">stacjonarne,</text:p>
      <text:p text:style-name="P8">4 semestr,</text:p>
      <text:p text:style-name="P8">Gr.1b</text:p>
      <text:p text:style-name="P9"><text:span text:style-name="T6">1. </text:span><text:span text:style-name="T7">Polecenie</text:span></text:p>
      <text:p text:style-name="P10"><text:bookmark text:name="yui_3_18_1_1_1781173845165_35"/><text:soft-page-break/>Stworzyć dwa obiekty przy użyciu OpenGL (w języku JavaScript). Po uruchomieniu zakończonego programu naciśnięcie jednego z klawiszy numerycznych 1 lub 2 spowoduje wybranie wyświetlanego obiektu. Program ustawia wartość zmiennej globalnej, objectNumber, aby powiedzieć, który obiekt ma zostać narysowany. Użytkownik może obracać obiekt za pomocą klawiszy strzałek, PageUp, PageDown i Home. Podprogram display() jest wywoływany, aby narysować obiekt. </text:p>
      <text:p text:style-name="P11">Obiekt 1. Korkociąg wokół osi {x | y | z} zawierający N obrotów. Punkty są stopniowo powiększane. Ustalić aktualny kolor rysujący na {zielony | niebieski | brązowy | … }.</text:p>
      <text:p text:style-name="P11">Obiekt 2. Pyramida, wykorzystując dwa wachlarze trójkątów oraz modelowanie hierarchiczne (najpierw tworzymy podprogramę rysowania jednego trójkonta; dalej wykorzystując przekształcenia geometryczne tworzymy pyramidę). Podstawą pyramidy jest wielokąt o N wierzchówkach.</text:p>
      <text:p text:style-name="P12">2. Wprowadzone dane</text:p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8">3. </text:span>Wynik działania</text:p>
      <text:p text:style-name="P15"><text:soft-page-break/><text:span text:style-name="T7"/></text:p>
      <text:p text:style-name="P16"><text:span text:style-name="T9">4</text:span><text:span text:style-name="T10">.Wykorzystane komendy:</text:span></text:p>
      <text:p text:style-name="P17">https://github.com/DziadekSwinka/Grafika/tree/872ba7d58c9a4b67a3925f2e21622b65b0abe453/Lab4%20-%20OpenGl</text:p>
      <text:p text:style-name="P16"><text:span text:style-name="T9">5. </text:span><text:span text:style-name="T10">Wnioski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8T12:04:21.229100000</meta:creation-date>
    <dc:date>2026-06-11T13:28:18.541204800</dc:date>
    <meta:editing-duration>PT49M58S</meta:editing-duration>
    <meta:editing-cycles>7</meta:editing-cycles>
    <meta:generator>LibreOffice/25.8.6.2$Windows_X86_64 LibreOffice_project/b4b39682cd9868fa725bc664aff94278d315bd04</meta:generator>
    <meta:print-date>2026-06-11T12:24:34.667737000</meta:print-date>
    <meta:printed-by>Pliki PDF</meta:printed-by>
    <meta:document-statistic meta:table-count="0" meta:image-count="4" meta:object-count="0" meta:page-count="3" meta:paragraph-count="20" meta:word-count="155" meta:character-count="1274" meta:non-whitespace-character-count="1138"/>
  </office:meta>
</office:document-meta>
</file>