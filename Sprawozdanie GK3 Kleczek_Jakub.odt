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380000021740D5C375.png" manifest:media-type="image/png"/>
  <manifest:file-entry manifest:full-path="Pictures/10000001000001EC00000322BB215F76.png" manifest:media-type="image/png"/>
  <manifest:file-entry manifest:full-path="Pictures/100000010000010600000129760C3E1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Text_20_body">
      <style:text-properties officeooo:paragraph-rsid="001d4b95"/>
    </style:style>
    <style:style style:name="P10" style:family="paragraph" style:parent-style-name="Text_20_body">
      <style:text-properties style:font-name="Calibri" fo:font-size="14pt" officeooo:rsid="00176b8a" officeooo:paragraph-rsid="001e171a" style:font-size-asian="14pt" style:font-name-complex="Calibri" style:font-size-complex="14pt"/>
    </style:style>
    <style:style style:name="P11" style:family="paragraph" style:parent-style-name="Text_20_body">
      <style:text-properties style:font-name="Calibri" fo:font-size="20pt" fo:font-weight="bold" officeooo:rsid="001bb48b" officeooo:paragraph-rsid="001e171a" style:font-size-asian="20pt" style:font-weight-asian="bold" style:font-name-complex="Calibri" style:font-size-complex="20pt" style:font-weight-complex="bold"/>
    </style:style>
    <style:style style:name="P12" style:family="paragraph" style:parent-style-name="Text_20_body">
      <style:text-properties style:font-name="Calibri" fo:font-size="20pt" fo:font-weight="bold" officeooo:rsid="001851a4" officeooo:paragraph-rsid="001e171a" style:font-size-asian="20pt" style:font-weight-asian="bold" style:font-name-complex="Calibri" style:font-size-complex="20pt" style:font-weight-complex="bold"/>
    </style:style>
    <style:style style:name="P13" style:family="paragraph" style:parent-style-name="Text_20_body">
      <style:text-properties style:font-name="Calibri" fo:font-size="14pt" officeooo:rsid="001693cd" officeooo:paragraph-rsid="001851a4" style:font-size-asian="14pt" style:font-name-complex="Calibri" style:font-size-complex="14pt"/>
    </style:style>
    <style:style style:name="P14" style:family="paragraph" style:parent-style-name="Text_20_body">
      <style:text-properties style:font-name="Calibri" fo:font-size="20pt" fo:font-weight="bold" officeooo:rsid="001d4b95" officeooo:paragraph-rsid="001e171a" style:font-size-asian="20pt" style:font-weight-asian="bold" style:font-name-complex="Calibri" style:font-size-complex="20pt" style:font-weight-complex="bold"/>
    </style:style>
    <style:style style:name="P15" style:family="paragraph" style:parent-style-name="Text_20_body">
      <style:text-properties style:font-name="Calibri" fo:font-size="20pt" officeooo:rsid="001851a4" officeooo:paragraph-rsid="001851a4" style:font-size-asian="20pt" style:font-name-complex="Calibri" style:font-size-complex="20pt"/>
    </style:style>
    <style:style style:name="P16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17" style:family="paragraph" style:parent-style-name="Text_20_body">
      <style:text-properties style:font-name="Calibri" fo:font-size="14pt" fo:font-weight="normal" officeooo:rsid="001851a4" officeooo:paragraph-rsid="001851a4" style:font-size-asian="14pt" style:font-weight-asian="normal" style:font-name-complex="Calibri" style:font-size-complex="14pt" style:font-weight-complex="normal"/>
    </style:style>
    <style:style style:name="P18" style:family="paragraph" style:parent-style-name="Text_20_body">
      <style:text-properties style:font-name="Calibri" fo:font-size="14pt" fo:font-weight="normal" officeooo:rsid="001851a4" style:font-size-asian="14pt" style:font-weight-asian="normal" style:font-name-complex="Calibri" style:font-size-complex="14pt" style:font-weight-complex="normal"/>
    </style:style>
    <style:style style:name="P19" style:family="paragraph" style:parent-style-name="Text_20_body">
      <style:text-properties style:font-name="Calibri" fo:font-size="20pt" fo:font-weight="bold" officeooo:rsid="001851a4" officeooo:paragraph-rsid="001851a4" style:font-size-asian="20pt" style:font-weight-asian="bold" style:font-name-complex="Calibri" style:font-size-complex="20pt" style:font-weight-complex="bold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style:font-size-asian="14pt" style:font-name-complex="Calibri" style:font-size-complex="14pt"/>
    </style:style>
    <style:style style:name="T3" style:family="text">
      <style:text-properties style:font-name="Calibri" fo:font-size="14pt" officeooo:rsid="001fd7da" style:font-size-asian="14pt" style:font-name-complex="Calibri" style:font-size-complex="14pt"/>
    </style:style>
    <style:style style:name="T4" style:family="text">
      <style:text-properties style:font-name="Calibri" fo:font-size="14pt" officeooo:rsid="0005171a" style:font-size-asian="14pt" style:font-name-complex="Calibri" style:font-size-complex="14pt"/>
    </style:style>
    <style:style style:name="T5" style:family="text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T6" style:family="text">
      <style:text-properties style:font-name="Calibri" fo:font-size="20pt" fo:font-weight="bold" officeooo:rsid="00176b8a" style:font-size-asian="20pt" style:font-weight-asian="bold" style:font-name-complex="Calibri" style:font-size-complex="20pt" style:font-weight-complex="bold"/>
    </style:style>
    <style:style style:name="T7" style:family="text">
      <style:text-properties fo:font-variant="normal" fo:text-transform="none" fo:color="#1d2125" loext:opacity="100%" fo:font-family="system-ui, apple-system, 'Segoe UI', Roboto, 'Helvetica Neue', 'Noto Sans', 'Liberation Sans', Arial, sans-serif, 'Apple Color Emoji', 'Segoe UI Emoji', 'Segoe UI Symbol', 'Noto Color Emoji'" fo:font-size="11.25pt" fo:letter-spacing="normal" fo:font-style="normal" fo:font-weight="normal"/>
    </style:style>
    <style:style style:name="T8" style:family="text">
      <style:text-properties fo:font-size="20pt" fo:font-weight="bold" officeooo:rsid="001d4b95" style:font-size-asian="20pt" style:font-weight-asian="bold" style:font-size-complex="20pt" style:font-weight-complex="bold"/>
    </style:style>
    <style:style style:name="T9" style:family="text">
      <style:text-properties officeooo:rsid="001bb48b"/>
    </style:style>
    <style:style style:name="T10" style:family="text">
      <style:text-properties fo:font-weight="bold" officeooo:rsid="001bb48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3" text:anchor-type="page" text:anchor-page-number="2" svg:x="9.569cm" svg:y="5.715cm" svg:width="8.943cm" svg:height="15.335cm" draw:z-index="2">
        <draw:image xlink:href="Pictures/10000001000001380000021740D5C375.png" xlink:type="simple" xlink:show="embed" xlink:actuate="onLoad" draw:mime-type="image/png"/>
      </draw:frame>
      <draw:frame draw:style-name="fr1" draw:name="Obraz2" text:anchor-type="page" text:anchor-page-number="2" svg:x="0.166cm" svg:y="5.715cm" svg:width="9.405cm" svg:height="15.332cm" draw:z-index="1">
        <draw:image xlink:href="Pictures/10000001000001EC00000322BB215F76.png" xlink:type="simple" xlink:show="embed" xlink:actuate="onLoad" draw:mime-type="image/png"/>
      </draw:frame>
      <draw:frame draw:style-name="fr1" draw:name="Obraz1" text:anchor-type="page" text:anchor-page-number="2" svg:x="2.344cm" svg:y="23.414cm" svg:width="5.546cm" svg:height="6.287cm" draw:z-index="0">
        <draw:image xlink:href="Pictures/100000010000010600000129760C3E1F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>OBRONI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1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2"> "</text:span></text:span><text:span text:style-name="Domyślna_20_czcionka_20_akapitu"><text:span text:style-name="T3">Język opisu sceny SVG</text:span></text:span><text:span text:style-name="Domyślna_20_czcionka_20_akapitu"><text:span text:style-name="T2">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2"> </text:span></text:span><text:span text:style-name="Domyślna_20_czcionka_20_akapitu"><text:span text:style-name="T4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oft-page-break/><text:span text:style-name="T5">1. </text:span><text:span text:style-name="T6">Polecenie</text:span></text:p>
      <text:p text:style-name="P10"><text:span text:style-name="T7">Opracować scenę hierarchiczną zgodnie z obrazem używając zamiast kół wielokąty obracające się (animacja!) według wariantu. Opracowanie powinno być w języku SVG.</text:span> <text:line-break/><text:span text:style-name="T8">2. Wprowadzone dane</text:span></text:p>
      <text:p text:style-name="P11"/>
      <text:p text:style-name="P12"><text:span text:style-name="T9">3. </text:span>Wynik działania</text:p>
      <text:p text:style-name="P13"><text:soft-page-break/></text:p>
      <text:p text:style-name="P13"/>
      <text:p text:style-name="P14"><text:span text:style-name="T6"/></text:p>
      <text:p text:style-name="P15"><text:span text:style-name="T10">4</text:span><text:span text:style-name="T11">.Wykorzystane komendy:</text:span></text:p>
      <text:p text:style-name="P16">https://github.com/DziadekSwinka/Grafika/tree/872ba7d58c9a4b67a3925f2e21622b65b0abe453/Lab3%20-%20SVG</text:p>
      <text:p text:style-name="P15"><text:span text:style-name="T10">5. </text:span><text:span text:style-name="T11">Wnioski</text:span></text:p>
      <text:p text:style-name="P17">W trakcie realizacji zadania poznano zasady tworzenia grafiki wektorowej w języku SVG oraz budowania scen hierarchicznych z wykorzystaniem zagnieżdżonych elementów grupujących. Zamiast kół zastosowano wielokąty, co pozwoliło na lepsze zrozumienie sposobu definiowania własnych obiektów geometrycznych za pomocą współrzędnych wierzchołków.</text:p>
      <text:p text:style-name="P18">Dodatkowo wykorzystano animacje obrotu, dzięki którym elementy sceny poruszają się w sposób płynny i niezależny. Pozwoliło to zapoznać się z mechanizmem animacji SVG oraz zasadami transformacji geometrycznych wykonywanych względem wybranego punktu obrotu.</text:p>
      <text:p text:style-name="P18">Ćwiczenie pokazało zalety grafiki wektorowej, takie jak skalowalność, niewielki rozmiar plików oraz możliwość tworzenia interaktywnych i animowanych scen bez użycia dodatkowych bibliotek. Zdobyte umiejętności mogą zostać wykorzystane przy projektowaniu animacji, wizualizacji danych oraz nowoczesnych interfejsów internetowych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1T12:24:23.569738800</dc:date>
    <meta:editing-duration>PT37M49S</meta:editing-duration>
    <meta:editing-cycles>5</meta:editing-cycles>
    <meta:generator>LibreOffice/25.8.6.2$Windows_X86_64 LibreOffice_project/b4b39682cd9868fa725bc664aff94278d315bd04</meta:generator>
    <meta:print-date>2026-06-11T12:15:12.067150100</meta:print-date>
    <meta:printed-by>Pliki PDF</meta:printed-by>
    <meta:document-statistic meta:table-count="0" meta:image-count="3" meta:object-count="0" meta:page-count="3" meta:paragraph-count="21" meta:word-count="169" meta:character-count="1466" meta:non-whitespace-character-count="1317"/>
  </office:meta>
</office:document-meta>
</file>