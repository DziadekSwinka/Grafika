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F000001601778737D.png" manifest:media-type="image/png"/>
  <manifest:file-entry manifest:full-path="Pictures/10000001000001720000025BC40F1E73.png" manifest:media-type="image/png"/>
  <manifest:file-entry manifest:full-path="Pictures/10000001000002F5000002F33BEF03DE.png" manifest:media-type="image/png"/>
  <manifest:file-entry manifest:full-path="Pictures/1000000100000228000001567C96994D.png" manifest:media-type="image/png"/>
  <manifest:file-entry manifest:full-path="Pictures/1000000100000325000002F6DBB51A51.png" manifest:media-type="image/png"/>
  <manifest:file-entry manifest:full-path="Pictures/1000000100000246000002652E118D98.png" manifest:media-type="image/png"/>
  <manifest:file-entry manifest:full-path="Pictures/100000010000024E00000011967524A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fo:font-weight="bold" officeooo:paragraph-rsid="001693cd" style:font-size-asian="20pt" style:font-weight-asian="bold" style:font-name-complex="Calibri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3" style:family="paragraph" style:parent-style-name="Standard">
      <style:text-properties style:font-name="Calibri" fo:font-size="14pt" officeooo:paragraph-rsid="001693cd" style:font-size-asian="14pt" style:font-name-complex="Calibri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2pt" fo:font-weight="bold" officeooo:rsid="001aaa10" officeooo:paragraph-rsid="001aaa10" style:font-size-asian="22pt" style:font-weight-asian="bold" style:font-name-complex="Calibri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693cd"/>
    </style:style>
    <style:style style:name="P6" style:family="paragraph" style:parent-style-name="Standard">
      <style:paragraph-properties fo:text-align="end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Calibri" fo:font-size="16pt" officeooo:rsid="0005171a" officeooo:paragraph-rsid="001693cd" style:font-size-asian="16pt" style:font-name-complex="Calibri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Calibri" fo:font-size="16pt" officeooo:paragraph-rsid="001693cd" style:font-size-asian="16pt" style:font-name-complex="Calibri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4pt" officeooo:rsid="001693cd" officeooo:paragraph-rsid="001693cd" style:font-size-asian="14pt" style:font-name-complex="Calibri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fo:font-size="14pt" officeooo:rsid="001693cd" officeooo:paragraph-rsid="001693cd" style:font-size-asian="14pt" style:font-name-complex="Calibri" style:font-size-complex="14pt"/>
    </style:style>
    <style:style style:name="P11" style:family="paragraph" style:parent-style-name="Text_20_body">
      <style:text-properties style:font-name="Calibri" fo:font-size="14pt" officeooo:paragraph-rsid="001693cd" style:font-size-asian="14pt" style:font-name-complex="Calibri" style:font-size-complex="14pt"/>
    </style:style>
    <style:style style:name="P12" style:family="paragraph" style:parent-style-name="Text_20_body" style:list-style-name="L1">
      <style:text-properties style:font-name="Calibri" fo:font-size="14pt" officeooo:rsid="001693cd" officeooo:paragraph-rsid="001693cd" style:font-size-asian="14pt" style:font-name-complex="Calibri" style:font-size-complex="14pt"/>
    </style:style>
    <style:style style:name="P13" style:family="paragraph" style:parent-style-name="Text_20_body">
      <style:text-properties style:font-name="Calibri" fo:font-size="14pt" officeooo:rsid="001693cd" officeooo:paragraph-rsid="001693cd" style:font-size-asian="14pt" style:font-name-complex="Calibri" style:font-size-complex="14pt"/>
    </style:style>
    <style:style style:name="P14" style:family="paragraph" style:parent-style-name="Text_20_body">
      <style:text-properties style:font-name="Calibri" fo:font-size="14pt" officeooo:rsid="00176b8a" officeooo:paragraph-rsid="00176b8a" style:font-size-asian="14pt" style:font-name-complex="Calibri" style:font-size-complex="14pt"/>
    </style:style>
    <style:style style:name="P15" style:family="paragraph" style:parent-style-name="Text_20_body" style:list-style-name="L2">
      <style:text-properties style:font-name="Calibri" fo:font-size="14pt" officeooo:rsid="00176b8a" officeooo:paragraph-rsid="001851a4" style:font-size-asian="14pt" style:font-name-complex="Calibri" style:font-size-complex="14pt"/>
    </style:style>
    <style:style style:name="P16" style:family="paragraph" style:parent-style-name="Text_20_body" style:list-style-name="L3">
      <style:text-properties style:font-name="Calibri" fo:font-size="14pt" officeooo:rsid="00176b8a" officeooo:paragraph-rsid="00176b8a" style:font-size-asian="14pt" style:font-name-complex="Calibri" style:font-size-complex="14pt"/>
    </style:style>
    <style:style style:name="P17" style:family="paragraph" style:parent-style-name="Text_20_body" style:list-style-name="L2">
      <style:text-properties style:font-name="Calibri" fo:font-size="14pt" officeooo:rsid="00176b8a" officeooo:paragraph-rsid="00176b8a" style:font-size-asian="14pt" style:font-name-complex="Calibri" style:font-size-complex="14pt"/>
    </style:style>
    <style:style style:name="P18" style:family="paragraph" style:parent-style-name="Text_20_body" style:list-style-name="L2">
      <style:text-properties style:font-name="Calibri" fo:font-size="14pt" officeooo:rsid="001851a4" officeooo:paragraph-rsid="001851a4" style:font-size-asian="14pt" style:font-name-complex="Calibri" style:font-size-complex="14pt"/>
    </style:style>
    <style:style style:name="P19" style:family="paragraph" style:parent-style-name="Text_20_body">
      <style:text-properties style:font-name="Calibri" fo:font-size="14pt" officeooo:rsid="001851a4" officeooo:paragraph-rsid="001851a4" style:font-size-asian="14pt" style:font-name-complex="Calibri" style:font-size-complex="14pt"/>
    </style:style>
    <style:style style:name="P20" style:family="paragraph" style:parent-style-name="Text_20_body" style:list-style-name="L4">
      <style:text-properties style:font-name="Calibri" fo:font-size="14pt" officeooo:rsid="001851a4" officeooo:paragraph-rsid="001851a4" style:font-size-asian="14pt" style:font-name-complex="Calibri" style:font-size-complex="14pt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style:font-size-asian="14pt" style:font-name-complex="Calibri" style:font-size-complex="14pt"/>
    </style:style>
    <style:style style:name="T3" style:family="text">
      <style:text-properties style:font-name="Calibri" fo:font-size="14pt" style:font-name-asian="Calibri" style:font-size-asian="14pt" style:font-name-complex="Calibri" style:font-size-complex="14pt"/>
    </style:style>
    <style:style style:name="T4" style:family="text">
      <style:text-properties style:font-name="Calibri" fo:font-size="14pt" officeooo:rsid="0005171a" style:font-size-asian="14pt" style:font-name-complex="Calibri" style:font-size-complex="14pt"/>
    </style:style>
    <style:style style:name="T5" style:family="text">
      <style:text-properties officeooo:rsid="0006efe9"/>
    </style:style>
    <style:style style:name="T6" style:family="text">
      <style:text-properties officeooo:rsid="0019e19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1" text:anchor-type="page" text:anchor-page-number="2" svg:x="2.307cm" svg:y="7.428cm" svg:width="7.832cm" svg:height="12.764cm" draw:z-index="0">
        <draw:image xlink:href="Pictures/10000001000001720000025BC40F1E73.png" xlink:type="simple" xlink:show="embed" xlink:actuate="onLoad" draw:mime-type="image/png"/>
      </draw:frame>
      <draw:frame draw:style-name="fr2" draw:name="Obraz2" text:anchor-type="page" text:anchor-page-number="3" svg:x="2.491cm" svg:y="2.768cm" svg:width="11.545cm" svg:height="11.515cm" draw:z-index="1">
        <draw:image xlink:href="Pictures/10000001000002F5000002F33BEF03DE.png" xlink:type="simple" xlink:show="embed" xlink:actuate="onLoad" draw:mime-type="image/png"/>
      </draw:frame>
      <draw:frame draw:style-name="fr2" draw:name="Obraz3" text:anchor-type="page" text:anchor-page-number="4" svg:x="0cm" svg:y="2.256cm" svg:width="9.721cm" svg:height="6.563cm" draw:z-index="2">
        <draw:image xlink:href="Pictures/10000001000001FF000001601778737D.png" xlink:type="simple" xlink:show="embed" xlink:actuate="onLoad" draw:mime-type="image/png"/>
      </draw:frame>
      <draw:frame draw:style-name="fr1" draw:name="Obraz4" text:anchor-type="page" text:anchor-page-number="4" svg:x="0cm" svg:y="9.58cm" svg:width="9.721cm" svg:height="5.932cm" draw:z-index="3">
        <draw:image xlink:href="Pictures/1000000100000228000001567C96994D.png" xlink:type="simple" xlink:show="embed" xlink:actuate="onLoad" draw:mime-type="image/png"/>
      </draw:frame>
      <draw:frame draw:style-name="fr2" draw:name="Obraz2 kopia 1" text:anchor-type="page" text:anchor-page-number="4" svg:x="10.174cm" svg:y="2.256cm" svg:width="10.827cm" svg:height="11.402cm" draw:z-index="4">
        <draw:image xlink:href="Pictures/1000000100000246000002652E118D98.png" xlink:type="simple" xlink:show="embed" xlink:actuate="onLoad" draw:mime-type="image/png"/>
      </draw:frame>
      <draw:frame draw:style-name="fr2" draw:name="Obraz5" text:anchor-type="page" text:anchor-page-number="4" svg:x="11.347cm" svg:y="15.055cm" svg:width="10.859cm" svg:height="0.326cm" draw:z-index="5">
        <draw:image xlink:href="Pictures/100000010000024E00000011967524AD.png" xlink:type="simple" xlink:show="embed" xlink:actuate="onLoad" draw:mime-type="image/png"/>
      </draw:frame>
      <draw:frame draw:style-name="fr3" draw:name="Obraz6" text:anchor-type="page" text:anchor-page-number="4" svg:x="3.955cm" svg:y="18.576cm" svg:width="12.539cm" svg:height="11.807cm" draw:z-index="6">
        <draw:image xlink:href="Pictures/1000000100000325000002F6DBB51A51.png" xlink:type="simple" xlink:show="embed" xlink:actuate="onLoad" draw:mime-type="image/png"/>
      </draw:frame>
      <text:p text:style-name="P1">SPRAWOZDANIE</text:p>
      <text:p text:style-name="P2">Zajęcia: Grafika komputerowa</text:p>
      <text:p text:style-name="P2">Prowadzący: mgr inż. Jakub Krawczyk</text:p>
      <text:p text:style-name="P3"/>
      <text:p text:style-name="P3"/>
      <text:p text:style-name="P3"/>
      <text:p text:style-name="P3"/>
      <text:p text:style-name="P3"/>
      <text:p text:style-name="P4">OBRONIO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Domyślna_20_czcionka_20_akapitu"><text:span text:style-name="T1">Laboratorium: </text:span></text:span><text:span text:style-name="Domyślna_20_czcionka_20_akapitu"><text:span text:style-name="T2">1</text:span></text:span></text:p>
      <text:p text:style-name="P5"><text:span text:style-name="Domyślna_20_czcionka_20_akapitu"><text:span text:style-name="T1">Data:</text:span></text:span><text:span text:style-name="Domyślna_20_czcionka_20_akapitu"><text:span text:style-name="T2"> 11.03.2026</text:span></text:span></text:p>
      <text:p text:style-name="P5"><text:span text:style-name="Domyślna_20_czcionka_20_akapitu"><text:span text:style-name="T1">Temat:</text:span></text:span><text:span text:style-name="Domyślna_20_czcionka_20_akapitu"><text:span text:style-name="T2"> "Grafika 2D z u</text:span></text:span><text:span text:style-name="Domyślna_20_czcionka_20_akapitu"><text:span text:style-name="T3">ż</text:span></text:span><text:span text:style-name="Domyślna_20_czcionka_20_akapitu"><text:span text:style-name="T2">yciem HTML Canvas"</text:span></text:span></text:p>
      <text:p text:style-name="P5"><text:span text:style-name="Domyślna_20_czcionka_20_akapitu"><text:span text:style-name="T1">Wariant:</text:span></text:span><text:span text:style-name="Domyślna_20_czcionka_20_akapitu"><text:span text:style-name="T2"> </text:span></text:span><text:span text:style-name="Domyślna_20_czcionka_20_akapitu"><text:span text:style-name="T4">1</text:span></text:span></text:p>
      <text:p text:style-name="P6"/>
      <text:p text:style-name="P6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7">Jakub Kleczek</text:p>
      <text:p text:style-name="P8">Informatyka I stopień,</text:p>
      <text:p text:style-name="P8">stacjonarne,</text:p>
      <text:p text:style-name="P8">4 semestr,</text:p>
      <text:p text:style-name="P8"><text:soft-page-break/>Gr.1b</text:p>
      <text:p text:style-name="P9">Zadanie 1</text:p>
      <text:list text:style-name="L1">
        <text:list-item>
          <text:p text:style-name="P10">Polecenie</text:p>
        </text:list-item>
      </text:list>
      <text:p text:style-name="P11">Plik Lab2Ex1.html proponuje rozsze<text:span text:style-name="T5">rz</text:span>enia do standardowych funkcji rysowania HTML Canvas.</text:p>
      <text:p text:style-name="P11">Narysowa<text:span text:style-name="T5">ć</text:span> obraz zgodnie z wariantem zadania (patrz Fig. 1) (u<text:span text:style-name="T5">ż</text:span>ywaj<text:span text:style-name="T5">ą</text:span>c zar<text:span text:style-name="T5">ó</text:span>wno standardowe jak i niestandardowe funkcje rysowania). </text:p>
      <text:list text:continue-numbering="true" text:style-name="L1">
        <text:list-item>
          <text:p text:style-name="P12">Wykorzystane komendy</text:p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</text:list-item>
        <text:list-item>
          <text:p text:style-name="P12"><text:soft-page-break/>Wynik działania</text:p>
        </text:list-item>
      </text:list>
      <text:p text:style-name="P13"/>
      <text:p text:style-name="P14">Zadanie 2</text:p>
      <text:list xml:id="list975995815" text:style-name="L2">
        <text:list-item>
          <text:p text:style-name="P15">Polecenie</text:p>
          <text:p text:style-name="P15"/>
          <text:p text:style-name="P15">W pliku Lab2Ex2.html program domyślnie rysuje szereg kwadratów. Stworzy´c narzędzia pozwalające na wykonywanie czynności </text:p>
        </text:list-item>
      </text:list>
      <text:list text:style-name="L3">
        <text:list-item>
          <text:p text:style-name="P16">"czyszczenie" canvasu - Clear button: Clear (Hint! Przy inicializacji musi by´c document.getElementById("clearButton").onclick = doClear; ) </text:p>
        </text:list-item>
        <text:list-item>
          <text:p text:style-name="P16">dodanie jednego nowego koloru do elementu . Implementować nowy kolor przez funkcje˛ doMouseMove. </text:p>
        </text:list-item>
        <text:list-item>
          <text:p text:style-name="P16">opracowanie nowego narzędzia - rysowania szeregu wielokątów (zgodnie z wariantem zad </text:p>
        </text:list-item>
      </text:list>
      <text:list text:continue-list="list975995815" text:style-name="L2">
        <text:list-item>
          <text:p text:style-name="P17">Wykorzystane polecenia</text:p>
        </text:list-item>
      </text:list>
      <text:p text:style-name="P14"/>
      <text:list text:continue-numbering="true" text:style-name="L2">
        <text:list-header>
          <text:p text:style-name="P17"/>
        </text:list-header>
      </text:list>
      <text:p text:style-name="P14"><text:soft-page-break/></text:p>
      <text:p text:style-name="P13"/>
      <text:list text:continue-numbering="true" text:style-name="L2">
        <text:list-item>
          <text:p text:style-name="P18">Wynik działania</text:p>
        </text:list-item>
      </text:list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Wnioski</text:p>
      <text:list text:style-name="L4">
        <text:list-item>
          <text:p text:style-name="P20">Element <text:span text:style-name="Source_20_Text">&lt;canvas&gt;</text:span> umożliwia rysowanie grafiki w przeglądarce przy użyciu JavaScript i daje dużą swobodę tworzenia. </text:p>
        </text:list-item>
        <text:list-item>
          <text:p text:style-name="P20">Rysowanie odbywa się poprzez kontekst 2D i operacje krok po kroku, co wymaga precyzyjnego określania współrzędnych. </text:p>
        </text:list-item>
        <text:list-item>
          <text:p text:style-name="P20"><text:span text:style-name="T6">Canvas p</text:span>ozwala również na zmianę stylów rysowania (kolorów, grubości linii, wypełnień), co zwiększa możliwości wizualne tworzonych elementów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2:04:21.229100000</meta:creation-date>
    <dc:date>2026-06-11T11:38:25.487225800</dc:date>
    <meta:editing-duration>PT7M52S</meta:editing-duration>
    <meta:editing-cycles>2</meta:editing-cycles>
    <meta:generator>LibreOffice/25.8.6.2$Windows_X86_64 LibreOffice_project/b4b39682cd9868fa725bc664aff94278d315bd04</meta:generator>
    <meta:document-statistic meta:table-count="0" meta:image-count="7" meta:object-count="0" meta:page-count="5" meta:paragraph-count="31" meta:word-count="187" meta:character-count="1397" meta:non-whitespace-character-count="1245"/>
  </office:meta>
</office:document-meta>
</file>