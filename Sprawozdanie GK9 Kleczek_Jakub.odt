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2EB6E12E661.png" manifest:media-type="image/png"/>
  <manifest:file-entry manifest:full-path="Pictures/10000001000001380000033B63F885B3.png" manifest:media-type="image/png"/>
  <manifest:file-entry manifest:full-path="Pictures/100000010000018D0000022C4E58D1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Text_20_body">
      <style:text-properties officeooo:paragraph-rsid="001d4b95"/>
    </style:style>
    <style:style style:name="P10" style:family="paragraph" style:parent-style-name="Text_20_body">
      <style:text-properties fo:font-variant="normal" fo:text-transform="none" fo:color="#1d2125" loext:opacity="100%" style:font-name="system-ui" fo:font-size="11.25pt" fo:letter-spacing="normal" fo:font-style="normal" fo:font-weight="normal" officeooo:rsid="00176b8a" officeooo:paragraph-rsid="001d4b95" style:font-size-asian="20pt" style:font-weight-asian="bold" style:font-name-complex="Calibri" style:font-size-complex="20pt" style:font-weight-complex="bold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d2125" loext:opacity="100%" style:font-name="system-ui" fo:font-size="11.25pt" fo:letter-spacing="normal" fo:font-style="normal" fo:font-weight="normal" officeooo:rsid="00176b8a" style:font-size-asian="20pt" style:font-weight-asian="bold" style:font-name-complex="Calibri" style:font-size-complex="20pt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d2125" loext:opacity="100%" style:font-name="system-ui" fo:font-size="11.25pt" fo:letter-spacing="normal" fo:font-style="normal" fo:font-weight="normal" officeooo:rsid="00176b8a" style:font-size-asian="20pt" style:font-weight-asian="bold" style:font-name-complex="Calibri" style:font-size-complex="20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system-ui" fo:font-size="11.25pt" fo:font-weight="normal" officeooo:rsid="00176b8a" style:font-size-asian="20pt" style:font-weight-asian="bold" style:font-name-complex="Calibri" style:font-size-complex="20pt" style:font-weight-complex="bold"/>
    </style:style>
    <style:style style:name="P14" style:family="paragraph" style:parent-style-name="Text_20_body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P15" style:family="paragraph" style:parent-style-name="Text_20_body">
      <style:text-properties style:font-name="Calibri" fo:font-size="20pt" fo:font-weight="bold" officeooo:rsid="001851a4" officeooo:paragraph-rsid="001e171a" style:font-size-asian="20pt" style:font-weight-asian="bold" style:font-name-complex="Calibri" style:font-size-complex="20pt" style:font-weight-complex="bold"/>
    </style:style>
    <style:style style:name="P16" style:family="paragraph" style:parent-style-name="Text_20_body">
      <style:text-properties style:font-name="Calibri" fo:font-size="20pt" fo:font-weight="bold" officeooo:rsid="001bb48b" officeooo:paragraph-rsid="001851a4" style:font-size-asian="20pt" style:font-weight-asian="bold" style:font-name-complex="Calibri" style:font-size-complex="20pt" style:font-weight-complex="bold"/>
    </style:style>
    <style:style style:name="P17" style:family="paragraph" style:parent-style-name="Text_20_body">
      <style:text-properties style:font-name="Calibri" fo:font-size="20pt" officeooo:rsid="001851a4" officeooo:paragraph-rsid="001851a4" style:font-size-asian="20pt" style:font-name-complex="Calibri" style:font-size-complex="20pt"/>
    </style:style>
    <style:style style:name="P18" style:family="paragraph" style:parent-style-name="Text_20_body">
      <style:text-properties style:font-name="Calibri" fo:font-size="14pt" fo:font-weight="normal" officeooo:rsid="001851a4" officeooo:paragraph-rsid="001851a4" style:font-size-asian="14pt" style:font-weight-asian="normal" style:font-name-complex="Calibri" style:font-size-complex="14pt" style:font-weight-complex="normal"/>
    </style:style>
    <style:style style:name="P19" style:family="paragraph" style:parent-style-name="Text_20_body">
      <style:text-properties style:font-name="Calibri" fo:font-size="20pt" officeooo:rsid="001851a4" officeooo:paragraph-rsid="002f25a2" style:font-size-asian="20pt" style:font-name-complex="Calibri" style:font-size-complex="20pt"/>
    </style:style>
    <style:style style:name="P20" style:family="paragraph" style:parent-style-name="Text_20_body">
      <style:text-properties style:font-name="Calibri" fo:font-size="14pt" fo:font-weight="normal" officeooo:rsid="001851a4" officeooo:paragraph-rsid="002f25a2" style:font-size-asian="14pt" style:font-weight-asian="normal" style:font-name-complex="Calibri" style:font-size-complex="14pt" style:font-weight-complex="normal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fo:font-weight="bold" officeooo:rsid="002de689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style:font-size-asian="14pt" style:font-name-complex="Calibri" style:font-size-complex="14pt"/>
    </style:style>
    <style:style style:name="T4" style:family="text">
      <style:text-properties style:font-name="Calibri" fo:font-size="14pt" officeooo:rsid="002de689" style:font-size-asian="14pt" style:font-name-complex="Calibri" style:font-size-complex="14pt"/>
    </style:style>
    <style:style style:name="T5" style:family="text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T6" style:family="text">
      <style:text-properties style:font-name="Calibri" fo:font-size="20pt" fo:font-weight="bold" officeooo:rsid="00176b8a" style:font-size-asian="20pt" style:font-weight-asian="bold" style:font-name-complex="Calibri" style:font-size-complex="20pt" style:font-weight-complex="bold"/>
    </style:style>
    <style:style style:name="T7" style:family="text">
      <style:text-properties fo:font-variant="normal" fo:text-transform="none" fo:color="#1d2125" loext:opacity="100%" fo:letter-spacing="normal" fo:font-style="normal"/>
    </style:style>
    <style:style style:name="T8" style:family="text">
      <style:text-properties officeooo:rsid="002b2c48"/>
    </style:style>
    <style:style style:name="T9" style:family="text">
      <style:text-properties officeooo:rsid="001bb48b"/>
    </style:style>
    <style:style style:name="T10" style:family="text">
      <style:text-properties fo:font-weight="bold" officeooo:rsid="001bb48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f25a2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3" text:anchor-type="page" text:anchor-page-number="4" svg:y="3.048cm" svg:width="17cm" svg:height="14.993cm" draw:z-index="2">
        <draw:image xlink:href="Pictures/100000010000034F000002EB6E12E661.png" xlink:type="simple" xlink:show="embed" xlink:actuate="onLoad" draw:mime-type="image/png"/>
      </draw:frame>
      <draw:frame draw:style-name="fr2" draw:name="Obraz2" text:anchor-type="page" text:anchor-page-number="3" svg:y="0cm" svg:width="11.204cm" svg:height="29.7cm" draw:z-index="1">
        <draw:image xlink:href="Pictures/10000001000001380000033B63F885B3.png" xlink:type="simple" xlink:show="embed" xlink:actuate="onLoad" draw:mime-type="image/png"/>
      </draw:frame>
      <draw:frame draw:style-name="fr2" draw:name="Obraz1" text:anchor-type="page" text:anchor-page-number="2" svg:y="12.22cm" svg:width="8.403cm" svg:height="11.769cm" draw:z-index="0">
        <draw:image xlink:href="Pictures/100000010000018D0000022C4E58D1E3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9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3"> "</text:span></text:span><text:span text:style-name="Domyślna_20_czcionka_20_akapitu"><text:span text:style-name="T4">Raymarch</text:span></text:span><text:span text:style-name="Domyślna_20_czcionka_20_akapitu"><text:span text:style-name="T3">"</text:span></text:span></text:p>
      <text:p text:style-name="P5"><text:span text:style-name="Domyślna_20_czcionka_20_akapitu"><text:span text:style-name="T1"/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oft-page-break/><text:span text:style-name="T5">1. </text:span><text:span text:style-name="T6">Polecenie</text:span></text:p>
      <text:p text:style-name="P10">Masz dwa kształty: koło i prostokąt. Oba zdefiniowane przez funkcje SDF w fragment shaderze, oba się animują — koło przesuwa się po jakiejś trajektorii, prostokąt się obraca albo zmienia proporcje, cokolwiek nietrywialnego.</text:p>
      <text:p text:style-name="P11">Połącz je jedną z operacji:</text:p>
      <text:list text:style-name="L1">
        <text:list-item>
          <text:p text:style-name="P12">suma — min(a,b)</text:p>
        </text:list-item>
        <text:list-item>
          <text:p text:style-name="P12">przecięcie — max(a,b)</text:p>
        </text:list-item>
        <text:list-item>
          <text:p text:style-name="P12">różnica — max(a, -b)</text:p>
        </text:list-item>
      </text:list>
      <text:p text:style-name="P13"><text:span text:style-name="T7">Aktywną operację kontroluje uniform (int 0/1/2), zmieniany trzema przyciskami w HTML. Wnętrze wynikowego kształtu (SDF &lt; 0) ma inny kolor niż tło.<text:line-break/><text:line-break/>Funkcje SDF wykorzystaj z instrukcji</text:span></text:p>
      <text:p text:style-name="P14">2. Wprowadzone dane <text:span text:style-name="T8">(fragmenty)</text:span></text:p>
      <text:p text:style-name="P15"/>
      <text:p text:style-name="P15"/>
      <text:p text:style-name="P15"/>
      <text:p text:style-name="P15"><text:soft-page-break/></text:p>
      <text:p text:style-name="P15"><text:soft-page-break/><text:span text:style-name="T9">3. </text:span>Wynik działania</text:p>
      <text:p text:style-name="P16"/>
      <text:p text:style-name="P17"><text:span text:style-name="T10">4</text:span><text:span text:style-name="T11">.Wykorzystane komendy:</text:span></text:p>
      <text:p text:style-name="P18"><text:a xlink:type="simple" xlink:href="https://github.com/DziadekSwinka/Grafika/tree/872ba7d58c9a4b67a3925f2e21622b65b0abe453/Lab9%20-%20Raymarch" text:style-name="Internet_20_link" text:visited-style-name="Visited_20_Internet_20_Link">https://github.com/DziadekSwinka/Grafika/tree/872ba7d58c9a4b67a3925f2e21622b65b0abe453/Lab9%20-%20Raymarch</text:a></text:p>
      <text:p text:style-name="P19"><text:span text:style-name="T12">5</text:span><text:span text:style-name="T11">.</text:span><text:span text:style-name="T12">Wnioski</text:span><text:span text:style-name="T11">:</text:span></text:p>
      <text:p text:style-name="P20">W ramach laboratorium zaimplementowano algorytm Raymarchingu w shaderze fragmentów, który odpowiada za renderowanie trójwymiarowej sceny z wykorzystaniem funkcji SDF (Signed Distance Fields). Aplikacja umożliwia dynamiczną animację sfery i prostopadłościanu oraz interaktywne modyfikowanie ich geometrii w czasie rzeczywistym poprzez operacje CSG sterowane z poziomu interfejsu HTML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6T13:45:38.846772500</dc:date>
    <meta:editing-duration>PT2H44M58S</meta:editing-duration>
    <meta:editing-cycles>14</meta:editing-cycles>
    <meta:generator>LibreOffice/25.8.6.2$Windows_X86_64 LibreOffice_project/b4b39682cd9868fa725bc664aff94278d315bd04</meta:generator>
    <meta:print-date>2026-06-16T13:43:16.139328200</meta:print-date>
    <meta:printed-by>Pliki PDF</meta:printed-by>
    <meta:document-statistic meta:table-count="0" meta:image-count="3" meta:object-count="0" meta:page-count="4" meta:paragraph-count="23" meta:word-count="153" meta:character-count="1246" meta:non-whitespace-character-count="1113"/>
  </office:meta>
</office:document-meta>
</file>