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1000001A424ABE8A4.png" manifest:media-type="image/png"/>
  <manifest:file-entry manifest:full-path="Pictures/10000001000002EE00000312B6BFDBB7.png" manifest:media-type="image/png"/>
  <manifest:file-entry manifest:full-path="Pictures/10000001000002E60000030D7778B4DE.png" manifest:media-type="image/png"/>
  <manifest:file-entry manifest:full-path="Pictures/1000000100000226000001E21FCEB98A.png" manifest:media-type="image/png"/>
  <manifest:file-entry manifest:full-path="Pictures/10000001000001CD0000020E47784DE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fo:font-weight="bold" officeooo:paragraph-rsid="001693cd" style:font-size-asian="20pt" style:font-weight-asian="bold" style:font-name-complex="Calibri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3" style:family="paragraph" style:parent-style-name="Standard">
      <style:text-properties style:font-name="Calibri" fo:font-size="14pt" officeooo:paragraph-rsid="001693cd" style:font-size-asian="14pt" style:font-name-complex="Calibri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2pt" fo:font-weight="bold" officeooo:rsid="001aaa10" officeooo:paragraph-rsid="001aaa10" style:font-size-asian="22pt" style:font-weight-asian="bold" style:font-name-complex="Calibri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693cd"/>
    </style:style>
    <style:style style:name="P6" style:family="paragraph" style:parent-style-name="Standard">
      <style:paragraph-properties fo:text-align="end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Calibri" fo:font-size="16pt" officeooo:rsid="0005171a" officeooo:paragraph-rsid="001693cd" style:font-size-asian="16pt" style:font-name-complex="Calibri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Calibri" fo:font-size="16pt" officeooo:paragraph-rsid="001693cd" style:font-size-asian="16pt" style:font-name-complex="Calibri" style:font-size-complex="16pt"/>
    </style:style>
    <style:style style:name="P9" style:family="paragraph" style:parent-style-name="Text_20_body">
      <style:text-properties officeooo:paragraph-rsid="001d4b95"/>
    </style:style>
    <style:style style:name="P10" style:family="paragraph" style:parent-style-name="Text_20_body">
      <style:text-properties style:font-name="Calibri" fo:font-size="14pt" officeooo:rsid="00176b8a" officeooo:paragraph-rsid="001e171a" style:font-size-asian="14pt" style:font-name-complex="Calibri" style:font-size-complex="14pt"/>
    </style:style>
    <style:style style:name="P11" style:family="paragraph" style:parent-style-name="Text_20_body">
      <style:text-properties style:font-name="Calibri" fo:font-size="20pt" fo:font-weight="bold" officeooo:rsid="001bb48b" officeooo:paragraph-rsid="001e171a" style:font-size-asian="20pt" style:font-weight-asian="bold" style:font-name-complex="Calibri" style:font-size-complex="20pt" style:font-weight-complex="bold"/>
    </style:style>
    <style:style style:name="P12" style:family="paragraph" style:parent-style-name="Text_20_body">
      <style:text-properties style:font-name="Calibri" fo:font-size="20pt" fo:font-weight="bold" officeooo:rsid="001851a4" officeooo:paragraph-rsid="001e171a" style:font-size-asian="20pt" style:font-weight-asian="bold" style:font-name-complex="Calibri" style:font-size-complex="20pt" style:font-weight-complex="bold"/>
    </style:style>
    <style:style style:name="P13" style:family="paragraph" style:parent-style-name="Text_20_body">
      <style:text-properties style:font-name="Calibri" fo:font-size="14pt" officeooo:rsid="001693cd" officeooo:paragraph-rsid="001851a4" style:font-size-asian="14pt" style:font-name-complex="Calibri" style:font-size-complex="14pt"/>
    </style:style>
    <style:style style:name="P14" style:family="paragraph" style:parent-style-name="Text_20_body">
      <style:text-properties officeooo:paragraph-rsid="001e171a"/>
    </style:style>
    <style:style style:name="P15" style:family="paragraph" style:parent-style-name="Text_20_body">
      <style:text-properties style:font-name="Calibri" fo:font-size="20pt" fo:font-weight="bold" officeooo:rsid="00176b8a" officeooo:paragraph-rsid="001e171a" style:font-size-asian="20pt" style:font-weight-asian="bold" style:font-name-complex="Calibri" style:font-size-complex="20pt" style:font-weight-complex="bold"/>
    </style:style>
    <style:style style:name="P16" style:family="paragraph" style:parent-style-name="Text_20_body">
      <style:text-properties style:font-name="Calibri" fo:font-size="20pt" fo:font-weight="bold" officeooo:rsid="001d4b95" officeooo:paragraph-rsid="001e171a" style:font-size-asian="20pt" style:font-weight-asian="bold" style:font-name-complex="Calibri" style:font-size-complex="20pt" style:font-weight-complex="bold"/>
    </style:style>
    <style:style style:name="P17" style:family="paragraph" style:parent-style-name="Text_20_body">
      <style:text-properties style:font-name="Calibri" fo:font-size="20pt" officeooo:rsid="001851a4" officeooo:paragraph-rsid="001851a4" style:font-size-asian="20pt" style:font-name-complex="Calibri" style:font-size-complex="20pt"/>
    </style:style>
    <style:style style:name="P18" style:family="paragraph" style:parent-style-name="Text_20_body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P19" style:family="paragraph" style:parent-style-name="Text_20_body">
      <style:text-properties style:font-name="Calibri" fo:font-size="20pt" fo:font-weight="bold" officeooo:rsid="001851a4" officeooo:paragraph-rsid="001851a4" style:font-size-asian="20pt" style:font-weight-asian="bold" style:font-name-complex="Calibri" style:font-size-complex="20pt" style:font-weight-complex="bold"/>
    </style:style>
    <style:style style:name="P20" style:family="paragraph" style:parent-style-name="Text_20_body" style:list-style-name="L1">
      <style:text-properties officeooo:paragraph-rsid="001851a4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style:font-name="Calibri" fo:font-size="14pt" officeooo:rsid="001851a4" style:font-size-asian="14pt" style:font-name-complex="Calibri" style:font-size-complex="14pt"/>
    </style:style>
    <style:style style:name="P22" style:family="paragraph" style:parent-style-name="Text_20_body" style:list-style-name="L3">
      <style:text-properties style:font-name="Calibri" fo:font-size="14pt" officeooo:rsid="001851a4" style:font-size-asian="14pt" style:font-name-complex="Calibri" style:font-size-complex="14pt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style:font-size-asian="14pt" style:font-name-complex="Calibri" style:font-size-complex="14pt"/>
    </style:style>
    <style:style style:name="T3" style:family="text">
      <style:text-properties style:font-name="Calibri" fo:font-size="14pt" officeooo:rsid="001e171a" style:font-size-asian="14pt" style:font-name-complex="Calibri" style:font-size-complex="14pt"/>
    </style:style>
    <style:style style:name="T4" style:family="text">
      <style:text-properties style:font-name="Calibri" fo:font-size="14pt" officeooo:rsid="0005171a" style:font-size-asian="14pt" style:font-name-complex="Calibri" style:font-size-complex="14pt"/>
    </style:style>
    <style:style style:name="T5" style:family="text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T6" style:family="text">
      <style:text-properties style:font-name="Calibri" fo:font-size="20pt" fo:font-weight="bold" officeooo:rsid="00176b8a" style:font-size-asian="20pt" style:font-weight-asian="bold" style:font-name-complex="Calibri" style:font-size-complex="20pt" style:font-weight-complex="bold"/>
    </style:style>
    <style:style style:name="T7" style:family="text">
      <style:text-properties fo:font-size="20pt" fo:font-weight="bold" officeooo:rsid="001d4b95" style:font-size-asian="20pt" style:font-weight-asian="bold" style:font-size-complex="20pt" style:font-weight-complex="bold"/>
    </style:style>
    <style:style style:name="T8" style:family="text">
      <style:text-properties officeooo:rsid="001bb48b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e171a" style:font-size-asian="14pt" style:font-weight-asian="normal" style:font-size-complex="14pt" style:font-weight-complex="normal"/>
    </style:style>
    <style:style style:name="T11" style:family="text">
      <style:text-properties fo:font-weight="bold" officeooo:rsid="001bb48b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alibri" fo:font-size="14pt" officeooo:rsid="001851a4" style:font-size-asian="14pt" style:font-name-complex="Calibri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5" text:anchor-type="page" text:anchor-page-number="3" svg:x="1.401cm" svg:y="7.359cm" svg:width="8.488cm" svg:height="8.89cm" draw:z-index="4">
        <draw:image xlink:href="Pictures/1000000100000191000001A424ABE8A4.png" xlink:type="simple" xlink:show="embed" xlink:actuate="onLoad" draw:mime-type="image/png"/>
      </draw:frame>
      <draw:frame draw:style-name="fr1" draw:name="Obraz4" text:anchor-type="page" text:anchor-page-number="3" svg:x="1.563cm" svg:y="18.882cm" svg:width="10.324cm" svg:height="10.818cm" draw:z-index="3">
        <draw:image xlink:href="Pictures/10000001000002EE00000312B6BFDBB7.png" xlink:type="simple" xlink:show="embed" xlink:actuate="onLoad" draw:mime-type="image/png"/>
      </draw:frame>
      <draw:frame draw:style-name="fr1" draw:name="Obraz3" text:anchor-type="page" text:anchor-page-number="2" svg:x="1.385cm" svg:y="21.581cm" svg:width="7.715cm" svg:height="8.119cm" draw:z-index="2">
        <draw:image xlink:href="Pictures/10000001000002E60000030D7778B4DE.png" xlink:type="simple" xlink:show="embed" xlink:actuate="onLoad" draw:mime-type="image/png"/>
      </draw:frame>
      <draw:frame draw:style-name="fr2" draw:name="Obraz2" text:anchor-type="page" text:anchor-page-number="2" svg:x="9.163cm" svg:y="8.322cm" svg:width="11.642cm" svg:height="10.202cm" draw:z-index="1">
        <draw:image xlink:href="Pictures/1000000100000226000001E21FCEB98A.png" xlink:type="simple" xlink:show="embed" xlink:actuate="onLoad" draw:mime-type="image/png"/>
      </draw:frame>
      <draw:frame draw:style-name="fr2" draw:name="Obraz1" text:anchor-type="page" text:anchor-page-number="2" svg:x="0.878cm" svg:y="7.945cm" svg:width="9.758cm" svg:height="11.134cm" draw:z-index="0">
        <draw:image xlink:href="Pictures/10000001000001CD0000020E47784DE2.png" xlink:type="simple" xlink:show="embed" xlink:actuate="onLoad" draw:mime-type="image/png"/>
      </draw:frame>
      <text:p text:style-name="P1">SPRAWOZDANIE</text:p>
      <text:p text:style-name="P2">Zajęcia: Grafika komputerowa</text:p>
      <text:p text:style-name="P2">Prowadzący: mgr inż. Jakub Krawczyk</text:p>
      <text:p text:style-name="P3"/>
      <text:p text:style-name="P3"/>
      <text:p text:style-name="P3"/>
      <text:p text:style-name="P3"/>
      <text:p text:style-name="P3"/>
      <text:p text:style-name="P4">OBRONIO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Domyślna_20_czcionka_20_akapitu"><text:span text:style-name="T1">Laboratorium: </text:span></text:span><text:span text:style-name="Domyślna_20_czcionka_20_akapitu"><text:span text:style-name="T2">1</text:span></text:span></text:p>
      <text:p text:style-name="P5"><text:span text:style-name="Domyślna_20_czcionka_20_akapitu"><text:span text:style-name="T1">Temat:</text:span></text:span><text:span text:style-name="Domyślna_20_czcionka_20_akapitu"><text:span text:style-name="T2"> "</text:span></text:span><text:span text:style-name="Domyślna_20_czcionka_20_akapitu"><text:span text:style-name="T3">Przekształcenia 2D z użyciem PYGAME</text:span></text:span><text:span text:style-name="Domyślna_20_czcionka_20_akapitu"><text:span text:style-name="T2">"</text:span></text:span></text:p>
      <text:p text:style-name="P5"><text:span text:style-name="Domyślna_20_czcionka_20_akapitu"><text:span text:style-name="T1">Wariant:</text:span></text:span><text:span text:style-name="Domyślna_20_czcionka_20_akapitu"><text:span text:style-name="T2"> </text:span></text:span><text:span text:style-name="Domyślna_20_czcionka_20_akapitu"><text:span text:style-name="T4">1</text:span></text:span></text:p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7">Jakub Kleczek</text:p>
      <text:p text:style-name="P8">Informatyka I stopień,</text:p>
      <text:p text:style-name="P8">stacjonarne,</text:p>
      <text:p text:style-name="P8">4 semestr,</text:p>
      <text:p text:style-name="P8">Gr.1b</text:p>
      <text:p text:style-name="P9"><text:soft-page-break/><text:span text:style-name="T5">1. </text:span><text:span text:style-name="T6">Polecenie</text:span></text:p>
      <text:p text:style-name="P10">Pokazany jest obraz shuttle.jpg w panelu. Narysowa´c zamiast obrazu wielokat wed lug wariantu (liczba n). Okno ma wymiary 600 na 600 pikseli, a wielokat ma promie´n 150 pikseli. Kolejne zadanie polega na stosowaniu odpowiednich przekszta lce´n do wielokata (lub bedziesz potrzebowa l kombinacji przekszta lce´n) po naci´snieciu na klawisze od 1 do 9 (patrz Fig. 1). <text:line-break/><text:span text:style-name="T7">2. Wprowadzone dane</text:span></text:p>
      <text:p text:style-name="P11"><text:line-break/><text:line-break/></text:p>
      <text:p text:style-name="P12"><text:span text:style-name="T8">3. </text:span>Wynik działania</text:p>
      <text:p text:style-name="P13"><text:soft-page-break/></text:p>
      <text:p text:style-name="P13"/>
      <text:p text:style-name="P14"><text:span text:style-name="T5">1. </text:span><text:span text:style-name="T6">Polecenie</text:span></text:p>
      <text:p text:style-name="P15"><text:span text:style-name="T9">Narysowa</text:span><text:span text:style-name="T10">ć</text:span><text:span text:style-name="T9"> figure okre</text:span><text:span text:style-name="T10">ś</text:span><text:span text:style-name="T9">lona wariantem</text:span> </text:p>
      <text:p text:style-name="P16">2. Wprowadzone dane</text:p>
      <text:p text:style-name="P16"/>
      <text:p text:style-name="P12"><text:span text:style-name="T8">3. </text:span>Wynik działania</text:p>
      <text:p text:style-name="P16"><text:soft-page-break/></text:p>
      <text:p text:style-name="P17"><text:span text:style-name="T11">4</text:span><text:span text:style-name="T12">.Wykorzystane komendy:</text:span></text:p>
      <text:p text:style-name="P18">https://github.com/DziadekSwinka/Grafika/tree/872ba7d58c9a4b67a3925f2e21622b65b0abe453/Lab2%20-%20Pygame</text:p>
      <text:p text:style-name="P19"><text:span text:style-name="T8">5. </text:span>Wnioski</text:p>
      <text:list text:style-name="L1">
        <text:list-item>
          <text:p text:style-name="P20"><text:span text:style-name="T13">W ramach pierwszego zadania poznano sposób rysowania wielokątów w bibliotece Pygame oraz wykorzystania przekształceń geometrycznych, takich jak obrót, skalowanie czy przesunięcie. Zastosowanie obsługi klawiatury umożliwiło dynamiczną zmianę położenia i wyglądu obiektu w czasie działania programu. </text:span></text:p>
        </text:list-item>
      </text:list>
      <text:list xml:id="list3403635923" text:style-name="L2">
        <text:list-item>
          <text:p text:style-name="P21">Drugie zadanie pozwoliło zapoznać się z tworzeniem bardziej złożonych figur z wykorzystaniem podstawowych kształtów geometrycznych (koła, kwadratu i trójkąta). Dzięki funkcjom modułu <text:span text:style-name="Source_20_Text">pygame.transform</text:span> możliwe było łatwe wykonywanie operacji transformacji na obiektach graficznych. </text:p>
        </text:list-item>
        <text:list-item text:style-override="L3">
          <text:p text:style-name="P22">Ćwiczenia pokazały praktyczne zastosowanie grafiki 2D w Pythonie oraz pozwoliły lepiej zrozumieć działanie przekształceń geometrycznych wykorzystywanych w programowaniu grafiki komputerowej. Zdobyta wiedza może zostać wykorzystana przy tworzeniu gier, animacji oraz interaktywnych aplikacji graficznych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2:04:21.229100000</meta:creation-date>
    <dc:date>2026-06-11T12:15:02.198620800</dc:date>
    <meta:editing-duration>PT28M28S</meta:editing-duration>
    <meta:editing-cycles>4</meta:editing-cycles>
    <meta:generator>LibreOffice/25.8.6.2$Windows_X86_64 LibreOffice_project/b4b39682cd9868fa725bc664aff94278d315bd04</meta:generator>
    <meta:print-date>2026-06-11T11:48:53.132138800</meta:print-date>
    <meta:printed-by>Pliki PDF</meta:printed-by>
    <meta:document-statistic meta:table-count="0" meta:image-count="5" meta:object-count="0" meta:page-count="4" meta:paragraph-count="26" meta:word-count="213" meta:character-count="1741" meta:non-whitespace-character-count="1549"/>
  </office:meta>
</office:document-meta>
</file>