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6500000200F88DC012.png" manifest:media-type="image/png"/>
  <manifest:file-entry manifest:full-path="Pictures/10000001000005DC000002F042390B01.png" manifest:media-type="image/png"/>
  <manifest:file-entry manifest:full-path="Pictures/10000001000001C9000003684D9709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fo:font-weight="bold" officeooo:paragraph-rsid="001693cd" style:font-size-asian="20pt" style:font-weight-asian="bold" style:font-name-complex="Calibri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3" style:family="paragraph" style:parent-style-name="Standard">
      <style:text-properties style:font-name="Calibri" fo:font-size="14pt" officeooo:paragraph-rsid="001693cd" style:font-size-asian="14pt" style:font-name-complex="Calibri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2pt" fo:font-weight="bold" officeooo:rsid="001aaa10" officeooo:paragraph-rsid="001aaa10" style:font-size-asian="22pt" style:font-weight-asian="bold" style:font-name-complex="Calibri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693cd"/>
    </style:style>
    <style:style style:name="P6" style:family="paragraph" style:parent-style-name="Standard">
      <style:paragraph-properties fo:text-align="end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Calibri" fo:font-size="16pt" officeooo:rsid="0005171a" officeooo:paragraph-rsid="001693cd" style:font-size-asian="16pt" style:font-name-complex="Calibri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Calibri" fo:font-size="16pt" officeooo:paragraph-rsid="001693cd" style:font-size-asian="16pt" style:font-name-complex="Calibri" style:font-size-complex="16pt"/>
    </style:style>
    <style:style style:name="P9" style:family="paragraph" style:parent-style-name="Text_20_body">
      <style:text-properties officeooo:paragraph-rsid="001d4b95"/>
    </style:style>
    <style:style style:name="P10" style:family="paragraph" style:parent-style-name="Text_20_body">
      <style:text-properties fo:font-variant="normal" fo:text-transform="none" fo:color="#1d2125" loext:opacity="100%" style:font-name="system-ui" fo:font-size="11.25pt" fo:letter-spacing="normal" fo:font-style="normal" fo:font-weight="normal" officeooo:rsid="00176b8a" officeooo:paragraph-rsid="001e171a" style:font-size-asian="14pt" style:font-name-complex="Calibri" style:font-size-complex="14pt"/>
    </style:style>
    <style:style style:name="P11" style:family="paragraph" style:parent-style-name="Text_20_body">
      <style:text-properties style:font-name="Calibri" fo:font-size="20pt" fo:font-weight="bold" officeooo:rsid="001d4b95" style:font-size-asian="20pt" style:font-weight-asian="bold" style:font-name-complex="Calibri" style:font-size-complex="20pt" style:font-weight-complex="bold"/>
    </style:style>
    <style:style style:name="P12" style:family="paragraph" style:parent-style-name="Text_20_body">
      <style:text-properties style:font-name="Calibri" fo:font-size="20pt" fo:font-weight="bold" officeooo:rsid="001851a4" officeooo:paragraph-rsid="001e171a" style:font-size-asian="20pt" style:font-weight-asian="bold" style:font-name-complex="Calibri" style:font-size-complex="20pt" style:font-weight-complex="bold"/>
    </style:style>
    <style:style style:name="P13" style:family="paragraph" style:parent-style-name="Text_20_body">
      <style:text-properties style:font-name="Calibri" fo:font-size="20pt" fo:font-weight="bold" officeooo:rsid="001d4b95" officeooo:paragraph-rsid="001851a4" style:font-size-asian="20pt" style:font-weight-asian="bold" style:font-name-complex="Calibri" style:font-size-complex="20pt" style:font-weight-complex="bold"/>
    </style:style>
    <style:style style:name="P14" style:family="paragraph" style:parent-style-name="Text_20_body">
      <style:text-properties style:font-name="Calibri" fo:font-size="20pt" officeooo:rsid="001851a4" officeooo:paragraph-rsid="001851a4" style:font-size-asian="20pt" style:font-name-complex="Calibri" style:font-size-complex="20pt"/>
    </style:style>
    <style:style style:name="P15" style:family="paragraph" style:parent-style-name="Text_20_body">
      <style:text-properties style:font-name="Calibri" fo:font-size="14pt" officeooo:rsid="001851a4" officeooo:paragraph-rsid="001851a4" style:font-size-asian="14pt" style:font-name-complex="Calibri" style:font-size-complex="14pt"/>
    </style:style>
    <style:style style:name="P16" style:family="paragraph" style:parent-style-name="Text_20_body">
      <style:text-properties style:font-name="Calibri" fo:font-size="14pt" fo:font-style="normal" fo:font-weight="normal" officeooo:rsid="001851a4" officeooo:paragraph-rsid="001851a4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7" style:family="paragraph" style:parent-style-name="Text_20_body">
      <style:text-properties style:font-name="Calibri" fo:font-size="14pt" fo:font-style="normal" fo:font-weight="normal" officeooo:rsid="001851a4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fo:font-weight="bold" officeooo:rsid="0022ab66" style:font-size-asian="14pt" style:font-weight-asian="bold" style:font-name-complex="Calibri" style:font-size-complex="14pt" style:font-weight-complex="bold"/>
    </style:style>
    <style:style style:name="T3" style:family="text">
      <style:text-properties style:font-name="Calibri" fo:font-size="14pt" style:font-size-asian="14pt" style:font-name-complex="Calibri" style:font-size-complex="14pt"/>
    </style:style>
    <style:style style:name="T4" style:family="text">
      <style:text-properties style:font-name="Calibri" fo:font-size="14pt" officeooo:rsid="0022ab66" style:font-size-asian="14pt" style:font-name-complex="Calibri" style:font-size-complex="14pt"/>
    </style:style>
    <style:style style:name="T5" style:family="text">
      <style:text-properties style:font-name="Calibri" fo:font-size="14pt" officeooo:rsid="0005171a" style:font-size-asian="14pt" style:font-name-complex="Calibri" style:font-size-complex="14pt"/>
    </style:style>
    <style:style style:name="T6" style:family="text">
      <style:text-properties style:font-name="Calibri" fo:font-size="20pt" fo:font-weight="bold" officeooo:rsid="001d4b95" style:font-size-asian="20pt" style:font-weight-asian="bold" style:font-name-complex="Calibri" style:font-size-complex="20pt" style:font-weight-complex="bold"/>
    </style:style>
    <style:style style:name="T7" style:family="text">
      <style:text-properties style:font-name="Calibri" fo:font-size="20pt" fo:font-weight="bold" officeooo:rsid="00176b8a" style:font-size-asian="20pt" style:font-weight-asian="bold" style:font-name-complex="Calibri" style:font-size-complex="20pt" style:font-weight-complex="bold"/>
    </style:style>
    <style:style style:name="T8" style:family="text">
      <style:text-properties officeooo:rsid="001bb48b"/>
    </style:style>
    <style:style style:name="T9" style:family="text">
      <style:text-properties fo:font-weight="bold" officeooo:rsid="001bb48b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3" text:anchor-type="page" text:anchor-page-number="2" svg:x="11.063cm" svg:y="8.438cm" svg:width="7.557cm" svg:height="10.837cm" draw:z-index="2">
        <draw:image xlink:href="Pictures/100000010000016500000200F88DC012.png" xlink:type="simple" xlink:show="embed" xlink:actuate="onLoad" draw:mime-type="image/png"/>
      </draw:frame>
      <draw:frame draw:style-name="fr1" draw:name="Obraz1" text:anchor-type="page" text:anchor-page-number="3" svg:x="1.891cm" svg:y="4.5cm" svg:width="17cm" svg:height="8.521cm" draw:z-index="1">
        <draw:image xlink:href="Pictures/10000001000005DC000002F042390B01.png" xlink:type="simple" xlink:show="embed" xlink:actuate="onLoad" draw:mime-type="image/png"/>
      </draw:frame>
      <draw:frame draw:style-name="fr2" draw:name="Obraz2" text:anchor-type="page" text:anchor-page-number="2" svg:x="1.27cm" svg:y="8.41cm" svg:width="9.673cm" svg:height="18.457cm" draw:z-index="0">
        <draw:image xlink:href="Pictures/10000001000001C9000003684D97093E.png" xlink:type="simple" xlink:show="embed" xlink:actuate="onLoad" draw:mime-type="image/png"/>
      </draw:frame>
      <text:p text:style-name="P1">SPRAWOZDANIE</text:p>
      <text:p text:style-name="P2">Zajęcia: Grafika komputerowa</text:p>
      <text:p text:style-name="P2">Prowadzący: mgr inż. Jakub Krawczyk</text:p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Domyślna_20_czcionka_20_akapitu"><text:span text:style-name="T1">Laboratorium: </text:span></text:span><text:span text:style-name="Domyślna_20_czcionka_20_akapitu"><text:span text:style-name="T2">5</text:span></text:span></text:p>
      <text:p text:style-name="P5"><text:span text:style-name="Domyślna_20_czcionka_20_akapitu"><text:span text:style-name="T1">Temat:</text:span></text:span><text:span text:style-name="Domyślna_20_czcionka_20_akapitu"><text:span text:style-name="T3"> "</text:span></text:span><text:span text:style-name="Domyślna_20_czcionka_20_akapitu"><text:span text:style-name="T4">Three.JS - podstawy</text:span></text:span><text:span text:style-name="Domyślna_20_czcionka_20_akapitu"><text:span text:style-name="T3">"</text:span></text:span></text:p>
      <text:p text:style-name="P5"><text:span text:style-name="Domyślna_20_czcionka_20_akapitu"><text:span text:style-name="T1">Wariant:</text:span></text:span><text:span text:style-name="Domyślna_20_czcionka_20_akapitu"><text:span text:style-name="T3"> </text:span></text:span><text:span text:style-name="Domyślna_20_czcionka_20_akapitu"><text:span text:style-name="T5">1</text:span></text:span></text:p>
      <text:p text:style-name="P6"/>
      <text:p text:style-name="P6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7">Jakub Kleczek</text:p>
      <text:p text:style-name="P8">Informatyka I stopień,</text:p>
      <text:p text:style-name="P8">stacjonarne,</text:p>
      <text:p text:style-name="P8">4 semestr,</text:p>
      <text:p text:style-name="P8">Gr.1b</text:p>
      <text:p text:style-name="P9"><text:soft-page-break/><text:span text:style-name="T6">1. </text:span><text:span text:style-name="T7">Polecenie</text:span></text:p>
      <text:p text:style-name="P10">Celem jest konstruowanie złożonego modelu za pomocą three.js - animowanej karuzeli  (podstawa karuzeli jest wielokątem odpowiednio z konfiguracją zadania) i co najmniej jednego innego wybranego modelu (patrz Fig.). Pliki do pobrania znajdują się poniżej. Głównym plikiem jest <text:span text:style-name="Emphasis">lab9.html</text:span>. Podfolder zasobów <text:span text:style-name="Emphasis">resources</text:span> zawiera dwa pliki JavaScript używane przez program oraz model konia, którego używamy w karuzeli. Zawiera również kilka plików graficznych, które można wykorzystać jako tekstury. </text:p>
      <text:p text:style-name="P11">2. Wprowadzone dane</text:p>
      <text:p text:style-name="P12"/>
      <text:p text:style-name="P12"/>
      <text:p text:style-name="P12"><text:soft-page-break/><text:span text:style-name="T8">3. </text:span>Wynik działania</text:p>
      <text:p text:style-name="P13"><text:span text:style-name="T7"/></text:p>
      <text:p text:style-name="P14"><text:span text:style-name="T9">4</text:span><text:span text:style-name="T10">.Wykorzystane komendy:</text:span></text:p>
      <text:p text:style-name="P15">https://github.com/DziadekSwinka/Grafika/tree/872ba7d58c9a4b67a3925f2e21622b65b0abe453/Lab5%20-%20ThreeJS</text:p>
      <text:p text:style-name="P14"><text:span text:style-name="T9">5. </text:span><text:span text:style-name="T10">Wnioski</text:span></text:p>
      <text:p text:style-name="P16">Podczas realizacji zadania zapoznano się z biblioteką Three.js służącą do tworzenia grafiki trójwymiarowej w środowisku przeglądarki internetowej. Utworzono złożony model karuzeli, której podstawa została wykonana w formie wielokąta zgodnego z wariantem zadania, a także dodano dodatkowy model 3D stanowiący element dekoracyjny lub użytkowy sceny.</text:p>
      <text:p text:style-name="P17">W trakcie pracy wykorzystano hierarchiczną strukturę obiektów, dzięki której możliwe było grupowanie elementów i ich wspólna animacja. Zastosowano również animacje obrotowe, pozwalające na realistyczne odwzorowanie ruchu karuzeli. Dodatkowo wykorzystano gotowe modele oraz tekstury, co umożliwiło zwiększenie realizmu i atrakcyjności wizualnej sceny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2:04:21.229100000</meta:creation-date>
    <dc:date>2026-06-11T15:20:27.695427600</dc:date>
    <meta:editing-duration>PT2H18M43S</meta:editing-duration>
    <meta:editing-cycles>8</meta:editing-cycles>
    <meta:generator>LibreOffice/25.8.6.2$Windows_X86_64 LibreOffice_project/b4b39682cd9868fa725bc664aff94278d315bd04</meta:generator>
    <meta:print-date>2026-06-11T14:15:43.153377700</meta:print-date>
    <meta:printed-by>Pliki PDF</meta:printed-by>
    <meta:document-statistic meta:table-count="0" meta:image-count="3" meta:object-count="0" meta:page-count="3" meta:paragraph-count="20" meta:word-count="189" meta:character-count="1567" meta:non-whitespace-character-count="1396"/>
  </office:meta>
</office:document-meta>
</file>